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486cm" fo:margin-left="-0.914cm" table:align="left" style:writing-mode="lr-tb"/>
    </style:style>
    <style:style style:name="Таблица1.A" style:family="table-column">
      <style:table-column-properties style:column-width="1.281cm"/>
    </style:style>
    <style:style style:name="Таблица1.B" style:family="table-column">
      <style:table-column-properties style:column-width="3.425cm"/>
    </style:style>
    <style:style style:name="Таблица1.C" style:family="table-column">
      <style:table-column-properties style:column-width="1.282cm"/>
    </style:style>
    <style:style style:name="Таблица1.D" style:family="table-column">
      <style:table-column-properties style:column-width="1.699cm"/>
    </style:style>
    <style:style style:name="Таблица1.E" style:family="table-column">
      <style:table-column-properties style:column-width="3.119cm"/>
    </style:style>
    <style:style style:name="Таблица1.F" style:family="table-column">
      <style:table-column-properties style:column-width="2.702cm"/>
    </style:style>
    <style:style style:name="Таблица1.G" style:family="table-column">
      <style:table-column-properties style:column-width="2.896cm"/>
    </style:style>
    <style:style style:name="Таблица1.H" style:family="table-column">
      <style:table-column-properties style:column-width="3.082cm"/>
    </style:style>
    <style:style style:name="Таблица1.A1" style:family="table-cell">
      <style:table-cell-properties style:vertical-align="middle" fo:padding="0cm" fo:border="none"/>
    </style:style>
    <style:style style:name="Таблица1.H1" style:family="table-cell">
      <style:table-cell-properties style:vertical-align="middle" fo:padding-left="0cm" fo:padding-right="0.049cm" fo:padding-top="0cm" fo:padding-bottom="0cm" fo:border-left="none" fo:border-right="0.05pt solid #000000" fo:border-top="none" fo:border-bottom="none"/>
    </style:style>
    <style:style style:name="P1" style:family="paragraph" style:parent-style-name="Heading_20_4">
      <style:paragraph-properties fo:margin-top="0.212cm" fo:margin-bottom="0.212cm" style:contextual-spacing="false" fo:text-align="left" style:justify-single-word="false" style:writing-mode="lr-tb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Text_20_body">
      <style:paragraph-properties fo:text-align="left" style:justify-single-word="false" style:writing-mode="lr-tb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" style:family="paragraph" style:parent-style-name="Heading_20_2">
      <style:paragraph-properties fo:text-align="left" style:justify-single-word="false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/>
    </style:style>
    <style:style style:name="P4" style:family="paragraph" style:parent-style-name="Text_20_body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Heading_20_2">
      <style:paragraph-properties fo:margin-top="0cm" fo:margin-bottom="0.247cm" style:contextual-spacing="false" fo:line-height="115%"/>
      <style:text-properties style:font-name="Times New Roman" fo:font-size="12pt" fo:font-style="normal" style:font-size-asian="12pt" style:font-size-complex="12pt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 style:list-style-name="L2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 style:list-style-name="L3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Heading_20_2">
      <style:paragraph-properties fo:margin-top="0cm" fo:margin-bottom="0.247cm" style:contextual-spacing="false" fo:line-height="115%"/>
      <style:text-properties style:font-name="Times New Roman" fo:font-size="12pt" fo:font-style="normal" officeooo:paragraph-rsid="001e555f" style:font-size-asian="12pt" style:font-style-asian="normal" style:font-size-complex="12pt" style:font-style-complex="normal"/>
    </style:style>
    <style:style style:name="P10" style:family="paragraph" style:parent-style-name="Text_20_body" style:list-style-name="L4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Heading_20_2">
      <style:paragraph-properties fo:margin-top="0cm" fo:margin-bottom="0.247cm" style:contextual-spacing="false" fo:line-height="115%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 style:list-style-name="L5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5">
      <style:text-properties style:font-name="Arial1" fo:font-weight="bold" style:font-weight-asian="bold"/>
    </style:style>
    <style:style style:name="P14" style:family="paragraph" style:parent-style-name="Heading_20_2">
      <style:paragraph-properties fo:margin-top="0cm" fo:margin-bottom="0.247cm" style:contextual-spacing="false" fo:line-height="115%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5" style:family="paragraph" style:parent-style-name="Text_20_body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.247cm" style:contextual-spacing="false" fo:line-height="115%"/>
      <style:text-properties style:font-name="Times New Roman" fo:font-size="12pt" fo:font-style="normal" fo:font-weight="bold" officeooo:paragraph-rsid="001d1ede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7">
      <style:text-properties style:font-name="Times New Roman" fo:font-size="12pt" fo:font-style="normal" fo:font-weight="normal" officeooo:paragraph-rsid="001d1ed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2">
      <style:paragraph-properties fo:margin-top="0cm" fo:margin-bottom="0.247cm" style:contextual-spacing="false" fo:line-height="115%"/>
      <style:text-properties style:font-name="Times New Roman" fo:font-size="12pt" fo:font-style="normal" officeooo:paragraph-rsid="001d1ede" style:font-size-asian="12pt" style:font-style-asian="normal" style:font-size-complex="12pt" style:font-style-complex="normal"/>
    </style:style>
    <style:style style:name="P19" style:family="paragraph" style:parent-style-name="Text_20_body" style:list-style-name="L8">
      <style:text-properties style:font-name="Times New Roman" fo:font-size="12pt" fo:font-style="normal" fo:font-weight="normal" officeooo:paragraph-rsid="001d1ed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officeooo:paragraph-rsid="0020bb92"/>
    </style:style>
    <style:style style:name="P21" style:family="paragraph" style:parent-style-name="Standard">
      <style:paragraph-properties fo:text-align="left" style:justify-single-word="false" style:writing-mode="lr-tb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Heading_20_1">
      <style:paragraph-properties fo:margin-top="0cm" fo:margin-bottom="0.247cm" style:contextual-spacing="false" fo:line-height="115%"/>
      <style:text-properties style:font-name="Times New Roman" fo:font-size="12pt" fo:font-style="normal" officeooo:rsid="001d1ede" officeooo:paragraph-rsid="001d1ede" style:font-size-asian="12pt" style:font-style-asian="normal" style:font-size-complex="12pt" style:font-style-complex="normal"/>
    </style:style>
    <style:style style:name="P23" style:family="paragraph" style:parent-style-name="Text_20_body" style:list-style-name="L9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list-style-name="L10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1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12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13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13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8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14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style:font-name="Times New Roman" fo:font-size="12pt" fo:language="ru" fo:country="RU" fo:font-style="normal" fo:font-weight="bold" officeooo:rsid="001e555f" officeooo:paragraph-rsid="001e555f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text-properties style:font-name="Times New Roman" fo:font-size="12pt" officeooo:paragraph-rsid="001e555f" style:font-size-asian="12pt" style:font-size-complex="12pt"/>
    </style:style>
    <style:style style:name="P34" style:family="paragraph" style:parent-style-name="Text_20_body">
      <style:text-properties style:font-name="Times New Roman" fo:font-size="12pt" fo:language="ru" fo:country="RU" fo:font-style="normal" fo:font-weight="normal" officeooo:rsid="002041d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style:font-name="Times New Roman" fo:font-size="12pt" officeooo:rsid="002041d1" style:font-size-asian="12pt" style:font-size-complex="12pt"/>
    </style:style>
    <style:style style:name="P36" style:family="paragraph" style:parent-style-name="Text_20_body">
      <style:text-properties style:font-name="Times New Roman" fo:font-size="12pt" fo:font-weight="bold" officeooo:rsid="002041d1" style:font-size-asian="12pt" style:font-size-complex="12pt"/>
    </style:style>
    <style:style style:name="P37" style:family="paragraph" style:parent-style-name="Text_20_body" style:list-style-name="L15">
      <style:text-properties style:font-name="Times New Roman" fo:font-size="12pt" officeooo:rsid="002041d1" style:font-size-asian="12pt" style:font-size-complex="12pt"/>
    </style:style>
    <style:style style:name="P38" style:family="paragraph" style:parent-style-name="Text_20_body">
      <style:text-properties style:font-name="Times New Roman" fo:font-size="12pt" fo:language="ru" fo:country="RU" fo:font-weight="bold" officeooo:rsid="002041d1" officeooo:paragraph-rsid="002041d1" style:font-size-asian="12pt" style:font-weight-asian="bold" style:font-size-complex="12pt" style:font-weight-complex="bold"/>
    </style:style>
    <style:style style:name="P39" style:family="paragraph" style:parent-style-name="Text_20_body">
      <style:text-properties style:font-name="Times New Roman" fo:font-size="12pt" fo:language="ru" fo:country="RU" fo:font-weight="normal" officeooo:rsid="002041d1" officeooo:paragraph-rsid="002041d1" style:font-size-asian="12pt" style:font-weight-asian="normal" style:font-size-complex="12pt" style:font-weight-complex="normal"/>
    </style:style>
    <style:style style:name="P40" style:family="paragraph" style:parent-style-name="Text_20_body" style:list-style-name="L16">
      <style:text-properties style:font-name="Times New Roman" fo:font-size="12pt" officeooo:rsid="002041d1" style:font-size-asian="12pt" style:font-size-complex="12pt"/>
    </style:style>
    <style:style style:name="P41" style:family="paragraph" style:parent-style-name="Text_20_body">
      <style:text-properties style:font-name="Times New Roman" fo:font-size="12pt" officeooo:rsid="002041d1" officeooo:paragraph-rsid="002041d1" style:font-size-asian="12pt" style:font-size-complex="12pt"/>
    </style:style>
    <style:style style:name="P42" style:family="paragraph" style:parent-style-name="Text_20_body">
      <style:text-properties style:font-name="Arial1" officeooo:rsid="002041d1" officeooo:paragraph-rsid="0020bb92"/>
    </style:style>
    <style:style style:name="P43" style:family="paragraph" style:parent-style-name="Heading_20_1">
      <style:paragraph-properties fo:text-align="left" style:justify-single-word="false" style:writing-mode="lr-tb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4" style:family="paragraph" style:parent-style-name="Heading_20_4">
      <style:paragraph-properties fo:margin-top="0cm" fo:margin-bottom="0.247cm" style:contextual-spacing="false" fo:line-height="115%" fo:text-align="left" style:justify-single-word="false" style:writing-mode="lr-tb"/>
      <style:text-properties fo:color="#333333" loext:opacity="100%" style:font-name="Times New Roman" fo:font-size="12pt" fo:font-style="normal" style:font-size-asian="12pt" style:font-style-asian="normal" style:font-size-complex="12pt" style:font-style-complex="normal"/>
    </style:style>
    <style:style style:name="P45" style:family="paragraph" style:parent-style-name="Text_20_body" style:list-style-name="WWNum11">
      <style:paragraph-properties fo:margin-left="1.251cm" fo:text-align="lef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fo:color="#333333" loext:opacity="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 style:list-style-name="WWNum12">
      <style:paragraph-properties fo:margin-left="1.251cm" fo:text-align="lef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fo:color="#333333" loext:opacity="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 style:list-style-name="WWNum13" style:master-page-name="">
      <loext:graphic-properties draw:fill="none"/>
      <style:paragraph-properties fo:margin-left="-0.101cm" fo:margin-right="0cm" fo:margin-top="0cm" fo:margin-bottom="0.247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fo:text-indent="-0.499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ext_20_body">
      <style:paragraph-properties fo:text-align="left" style:justify-single-word="false" style:writing-mode="lr-tb"/>
      <style:text-properties fo:font-variant="normal" fo:text-transform="none" fo:color="#333333" loext:opacity="100%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>
      <style:paragraph-properties fo:text-align="left" style:justify-single-word="false" style:writing-mode="lr-tb"/>
      <style:text-properties fo:color="#000000" loext:opacity="100%" style:font-name="Times New Roman" fo:font-size="12pt" fo:font-style="normal" fo:font-weight="bold" officeooo:rsid="0021def3" officeooo:paragraph-rsid="0021def3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Heading_20_3">
      <style:paragraph-properties fo:text-align="left" style:justify-single-word="false" style:writing-mode="lr-tb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17">
      <style:text-properties fo:color="#333333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52" style:family="paragraph" style:parent-style-name="Heading_20_1">
      <style:paragraph-properties fo:text-align="left" style:justify-single-word="false" style:writing-mode="lr-tb"/>
      <style:text-properties style:font-name="Times New Roman" fo:font-size="12pt" fo:font-style="normal" officeooo:paragraph-rsid="0021def3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text-align="left" style:justify-single-word="false" style:writing-mode="lr-tb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6" style:family="paragraph" style:parent-style-name="Text_20_body">
      <style:paragraph-properties fo:margin-top="0cm" fo:margin-bottom="0.247cm" style:contextual-spacing="false" fo:text-align="left" style:justify-single-word="false" style:writing-mode="lr-tb"/>
      <style:text-properties fo:color="#000000" loext:opacity="100%" style:font-name="Arial1" fo:font-size="15pt" fo:language="ru" fo:country="RU" fo:font-style="normal" fo:font-weight="bold" officeooo:rsid="002041d1" officeooo:paragraph-rsid="0021def3" style:font-size-asian="15pt" style:font-style-asian="normal" style:font-weight-asian="bold" style:font-size-complex="15pt" style:font-style-complex="normal" style:font-weight-complex="bold"/>
    </style:style>
    <style:style style:name="P57" style:family="paragraph" style:parent-style-name="Heading_20_3">
      <style:paragraph-properties fo:margin-top="0cm" fo:margin-bottom="0.247cm" style:contextual-spacing="false" fo:text-align="left" style:justify-single-word="false" style:writing-mode="lr-tb"/>
      <style:text-properties fo:color="#000000" loext:opacity="100%" style:font-name="Times New Roman" fo:font-size="12pt" fo:language="ru" fo:country="RU" fo:font-style="normal" fo:font-weight="bold" officeooo:rsid="002041d1" officeooo:paragraph-rsid="002041d1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Quotations">
      <style:paragraph-properties fo:margin-left="0cm" fo:margin-top="0cm" fo:margin-bottom="0.247cm" style:contextual-spacing="false" fo:line-height="115%" fo:text-align="left" style:justify-single-word="false" fo:text-indent="0cm" style:auto-text-indent="false"/>
      <style:text-properties fo:color="#000000" loext:opacity="100%" style:font-name="Times New Roman" fo:font-size="12pt" fo:font-weight="normal" officeooo:rsid="002041d1" style:font-size-asian="12pt" style:font-weight-asian="normal" style:font-size-complex="12pt" style:font-weight-complex="normal"/>
    </style:style>
    <style:style style:name="P59" style:family="paragraph" style:parent-style-name="Quotations" style:list-style-name="L18">
      <style:paragraph-properties fo:margin-top="0cm" fo:margin-bottom="0.247cm" style:contextual-spacing="false" fo:line-height="115%" fo:text-align="left" style:justify-single-word="false"/>
      <style:text-properties fo:color="#000000" loext:opacity="100%" style:font-name="Times New Roman" fo:font-size="12pt" fo:font-weight="normal" officeooo:rsid="002041d1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top="0cm" fo:margin-bottom="0.247cm" style:contextual-spacing="false" fo:text-align="left" style:justify-single-word="false" style:writing-mode="lr-tb"/>
      <style:text-properties fo:color="#000000" loext:opacity="100%" style:font-name="Arial1" fo:font-size="15pt" fo:language="ru" fo:country="RU" fo:font-style="normal" fo:font-weight="bold" officeooo:rsid="002041d1" officeooo:paragraph-rsid="002520a2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style:font-style-asian="normal" style:font-style-complex="normal"/>
    </style:style>
    <style:style style:name="T4" style:family="text">
      <style:text-properties fo:font-variant="normal" fo:text-transform="none" fo:color="#333333" loext:opacity="100%" fo:letter-spacing="normal" fo:font-weight="bold" style:font-weight-asian="bold" style:font-weight-complex="bold"/>
    </style:style>
    <style:style style:name="T5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7" style:family="text">
      <style:text-properties officeooo:rsid="001d1ede"/>
    </style:style>
    <style:style style:name="T8" style:family="text">
      <style:text-properties style:font-name="Times New Roman" fo:font-size="12pt" officeooo:rsid="001d1ede" style:font-size-asian="12pt" style:font-size-complex="12pt"/>
    </style:style>
    <style:style style:name="T9" style:family="text">
      <style:text-properties fo:font-variant="normal" fo:text-transform="none" fo:color="#ffffff" loext:opacity="75%" style:font-name="Times New Roman" fo:font-size="12pt" fo:letter-spacing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language="en" fo:country="US" fo:font-weight="bold" officeooo:rsid="001e555f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language="ru" fo:country="RU" fo:font-weight="bold" officeooo:rsid="001e555f" style:font-size-asian="12pt" style:font-weight-asian="bold" style:font-size-complex="12pt" style:font-weight-complex="bold"/>
    </style:style>
    <style:style style:name="T14" style:family="text">
      <style:text-properties fo:color="#000000" loext:opacity="100%" style:font-name="Times New Roman" fo:font-size="12pt" fo:language="ru" fo:country="RU" fo:font-style="normal" fo:font-weight="bold" officeooo:rsid="002041d1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en" fo:country="US" fo:font-weight="bold" officeooo:rsid="002520a2" style:font-weight-asian="bold" style:font-weight-complex="bold"/>
    </style:style>
    <style:style style:name="T17" style:family="text">
      <style:text-properties fo:language="ru" fo:country="RU" fo:font-weight="bold" officeooo:rsid="002520a2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imes New Roman" fo:font-size="12pt" fo:font-style="normal" fo:font-weight="normal" officeooo:rsid="001d1ed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language="en" fo:country="US" fo:font-style="normal" fo:font-weight="bold" officeooo:rsid="001e555f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Times New Roman" fo:font-size="12pt" fo:language="ru" fo:country="RU" fo:font-style="normal" fo:font-weight="bold" officeooo:rsid="001e555f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language="ru" fo:country="RU" fo:font-style="normal" fo:font-weight="bold" officeooo:rsid="001e555f" style:font-style-asian="normal" style:font-weight-asian="bold" style:font-style-complex="normal" style:font-weight-complex="bold"/>
    </style:style>
    <style:style style:name="T23" style:family="text">
      <style:text-properties fo:text-transform="uppercase" fo:color="#000000" loext:opacity="100%" fo:letter-spacing="normal" fo:font-style="normal" fo:font-weight="bold" style:font-weight-asian="bold" style:font-weight-complex="bold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font-weight="bold"/>
    </style:style>
    <style:style style:name="T26" style:family="text">
      <style:text-properties style:font-name="Times New Roman" fo:font-size="12pt" fo:font-weight="normal" officeooo:rsid="001d1ede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bold" officeooo:rsid="002041d1" style:font-size-asian="12pt" style:font-weight-asian="bold" style:font-size-complex="12pt" style:font-weight-complex="bold"/>
    </style:style>
    <style:style style:name="T28" style:family="text">
      <style:text-properties fo:font-style="normal" officeooo:rsid="001e555f" style:font-style-asian="normal" style:font-style-complex="normal"/>
    </style:style>
    <style:style style:name="T2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333333" loext:opacity="100%" fo:letter-spacing="normal" fo:language="en" fo:country="US" fo:font-weight="bold" officeooo:rsid="001e555f" style:font-weight-asian="bold" style:font-weight-complex="bold"/>
    </style:style>
    <style:style style:name="T32" style:family="text">
      <style:text-properties fo:color="#333333" loext:opacity="100%" fo:font-weight="normal" style:font-weight-asian="normal" style:font-weight-complex="normal"/>
    </style:style>
    <style:style style:name="T33" style:family="text">
      <style:text-properties fo:color="#333333" loext:opacity="100%" officeooo:rsid="001e555f"/>
    </style:style>
    <style:style style:name="T34" style:family="text">
      <style:text-properties fo:color="#333333" loext:opacity="100%"/>
    </style:style>
    <style:style style:name="T35" style:family="text">
      <style:text-properties fo:color="#000000" loext:opacity="100%" fo:font-weight="bold" style:font-weight-asian="bold" style:font-weight-complex="normal"/>
    </style:style>
    <style:style style:name="T36" style:family="text">
      <style:text-properties officeooo:rsid="0021def3"/>
    </style:style>
    <style:style style:name="T37" style:family="text">
      <style:text-properties fo:color="#333333" loext:opacity="100%" fo:font-weight="bold" style:font-weight-asian="bold" style:font-weight-complex="normal"/>
    </style:style>
    <style:style style:name="T3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Times New Roman" fo:font-size="12pt" fo:letter-spacing="normal" fo:font-weight="bold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style:font-name="Times New Roman" fo:font-size="12pt" fo:letter-spacing="normal" fo:font-weight="bold" officeooo:rsid="0023b276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style:font-name="Times New Roman" fo:font-size="12pt" fo:letter-spacing="normal" fo:font-weight="bold" style:font-size-asian="12pt" style:font-weight-asian="bold" style:font-size-complex="12pt" style:font-weight-complex="normal"/>
    </style:style>
    <style:style style:name="T43" style:family="text">
      <style:text-properties officeooo:rsid="0023b276"/>
    </style:style>
    <style:style style:name="T44" style:family="text">
      <style:text-properties officeooo:rsid="002520a2"/>
    </style:style>
    <style:style style:name="T45" style:family="text">
      <style:text-properties fo:font-variant="normal" fo:text-transform="none" style:font-name="Times New Roman" fo:font-size="12pt" fo:letter-spacing="normal" fo:font-weight="bold" officeooo:rsid="002520a2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style:font-name="Times New Roman" fo:font-size="12pt" fo:letter-spacing="normal" fo:font-weight="normal" officeooo:rsid="002520a2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Железо которое нам надо</text:h>
      <text:p text:style-name="P2"><text:span text:style-name="T1">Unity-</text:span><text:span text:style-name="T2">разработчик </text:span></text:p>
      <text:h text:style-name="P3" text:outline-level="2">1. Центральный процессор: AMD Ryzen 5 5600</text:h>
      <text:list text:style-name="L1">
        <text:list-item>
          <text:p text:style-name="P4">Архитектурное превосходство: Использование архитектуры Zen 3 с объемом L3-кеша в 32 МБ критически важно для геймдева. В отличие от бюджетных аналогов, этот объем позволяет процессору быстрее обрабатывать сложные иерархии объектов в Unity и ускорять деформацию высокополигональных мешей в Blender.</text:p>
        </text:list-item>
        <text:list-item>
          <text:p text:style-name="P4">Многопоточность для Dev-задач: 12 вычислительных потоков являются индустриальным стандартом для параллельных вычислений: компиляции шейдеров, генерации навигационных сеток (NavMesh) и просчета физики тканей.</text:p>
        </text:list-item>
        <text:list-item>
          <text:p text:style-name="P4">Экономическая стратегия: Выбор платформы AM4 позволяет сократить расходы на материнскую плату и ОЗУ без потери производительности в разработке. Сэкономленные средства инвестированы в графическую подсистему (RTX 4070 Super), что дает больший прирост в скорости работы, чем переход на более дорогую платформу Intel.</text:p>
        </text:list-item>
      </text:list>
      <text:h text:style-name="P5" text:outline-level="2"><text:span text:style-name="T3">2. </text:span><text:span text:style-name="T4">Видеокарта MSI GeForce RTX 4070 SUPER GAMING X SLIM</text:span></text:h>
      <text:p text:style-name="P6"/>
      <text:list text:style-name="L2">
        <text:list-item>
          <text:p text:style-name="P7">Аппаратное ускорение (CUDA &amp; RT ядра): В разработке игр и 3D-графике видеокарты NVIDIA являются безальтернативным стандартом. Технология OptiX в Blender позволяет сократить время рендеринга в 3-5 раз по сравнению с CPU, а ядра RT необходимы для корректного тестирования освещения в реальном времени.</text:p>
        </text:list-item>
        <text:list-item>
          <text:p text:style-name="P7">Объем и тип памяти: 12 ГБ видеопамяти GDDR6X — это необходимый порог для работы с 4K-текстурами и сложными сценами. При нехватке видеопамяти движки (Unity/Unreal) начинают использовать медленную ОЗУ, что приводит к критическим вылетам редактора и потере данных.</text:p>
        </text:list-item>
        <text:list-item>
          <text:p text:style-name="P7">Технологический стек: Поддержка DLSS 3.5 позволяет разработчику оптимизировать игру под самые современные технологии апскейлинга, что невозможно на картах прошлых поколений или аналогах от AMD.</text:p>
        </text:list-item>
      </text:list>
      <text:h text:style-name="P5" text:outline-level="2"><text:span text:style-name="T3">3. </text:span><text:span text:style-name="T4">Материнская плата GIGABYTE B550M AORUS ELITE</text:span></text:h>
      <text:list text:style-name="L3">
        <text:list-item>
          <text:p text:style-name="P8">Поддержка PCIe 4.0: Это ключевой аргумент. Шина четвертого поколения удваивает пропускную способность между видеокартой и процессором, а также позволяет NVMe-накопителям работать на скоростях выше 3500 МБ/с. На более дешевых платах (A520/B450) потенциал мощной видеокарты и быстрого SSD будет ограничен.</text:p>
        </text:list-item>
        <text:list-item>
          <text:p text:style-name="P8">Надежность и VRM: Платы серий DS3H или PRO-VDH обладают усиленными цепями питания и радиаторами. Это гарантирует стабильную работу системы при многочасовых рендерах, когда процессор и память работают на пределе возможностей, исключая риск перегрева и внезапной перезагрузки.</text:p>
        </text:list-item>
      </text:list>
      <text:h text:style-name="P9" text:outline-level="2"><text:soft-page-break/>4. Оперативная память: 32GB DDR4 3200MHz (2x16GB Kit) Kingston FURY Beast</text:h>
      <text:list text:style-name="L4">
        <text:list-item>
          <text:p text:style-name="P10">Многозадачность (Workflow): Современный пайплай разработки подразумевает одновременную работу Unity, Visual Studio, браузера с 20+ вкладками и графического редактора (Substance Painter/Blender). 16 ГБ памяти в таких условиях заполняются мгновенно, приводя к фризам системы. 32 ГБ обеспечивают плавную работу и исключают износ SSD через файл подкачки.</text:p>
        </text:list-item>
        <text:list-item>
          <text:p text:style-name="P10">Двухканальный режим: Использование двух модулей памяти удваивает скорость обмена данными, что напрямую влияет на минимальный FPS во вьюпорте при редактировании тяжелых игровых локаций.</text:p>
        </text:list-item>
      </text:list>
      <text:h text:style-name="P11" text:outline-level="2">5. Накопитель: 1TB NVMe M.2 SSD (Kingston NV2 / KC3000)</text:h>
      <text:list text:style-name="L5">
        <text:list-item>
          <text:p text:style-name="P12">Скорость импорта ассетов: Протокол NVMe обеспечивает скорость до 7000 МБ/с (для KC3000). В геймдеве, где проект может состоять из тысяч мелких файлов и тяжелых текстур, это сокращает время импорта ассетов и открытия сцен в несколько раз по сравнению с SATA SSD.</text:p>
        </text:list-item>
        <text:list-item>
          <text:p text:style-name="P13"><text:span text:style-name="T5">Ресурс и объем: Объем 1 ТБ выбран с учетом специфики Unity: папка </text:span><text:span text:style-name="Source_20_Text"><text:span text:style-name="T5">Library</text:span></text:span><text:span text:style-name="T5"> в крупных проектах может занимать сотни гигабайт. Использование высококачественной памяти обеспечивает долговечность диска при постоянной перезаписи временных данных</text:span><text:span text:style-name="T6">.</text:span></text:p>
        </text:list-item>
      </text:list>
      <text:h text:style-name="P14" text:outline-level="2">6. Блок питания: Deepcool PK650D (80+ Bronze)</text:h>
      <text:list text:style-name="L6">
        <text:list-item>
          <text:p text:style-name="P15">Защита инвестиций: Блок питания — это гарантия безопасности всего дорогостоящего железа. Сертификат 80+ Bronze означает высокую энергоэффективность и наличие защит от короткого замыкания, скачков напряжения и перегрузки.</text:p>
        </text:list-item>
        <text:list-item>
          <text:p text:style-name="P15">Акустический комфорт: Выбор мощности 650 Вт при реальном потреблении системы в ~350 Вт позволяет блоку питания работать вполсилы. Это минимизирует нагрев и шум вентилятора, создавая комфортную рабочую среду для длительной творческой деятельност<text:span text:style-name="T7">ь</text:span></text:p>
        </text:list-item>
      </text:list>
      <text:p text:style-name="P16"><text:span text:style-name="T7">7.</text:span> Система охлаждения процессора: ID-Cooling SE-224-XTS</text:p>
      <text:list xml:id="list833673515" text:style-name="L7">
        <text:list-item>
          <text:p text:style-name="P17">Терморегуляция и ресурс: В отличие от стандартных решений, башенный кулер с четырьмя медными тепловыми трубками обеспечивает эффективный отвод тепла при длительных вычислительных нагрузках.</text:p>
        </text:list-item>
        <text:list-item>
          <text:p text:style-name="P17">Стабильность частот: Качественное охлаждение предотвращает троттлинг (сброс частот процессора при нагреве), что гарантирует стабильно высокую производительность на протяжении всего процесса работы над сложной сценой.</text:p>
        </text:list-item>
      </text:list>
      <text:h text:style-name="P18" text:outline-level="2"><text:span text:style-name="T7">8</text:span>. Корпус: Deepcool CC560 V2</text:h>
      <text:list xml:id="list2853936058" text:style-name="L8">
        <text:list-item>
          <text:p text:style-name="P19">Воздушный поток (Airflow): Корпус оснащен перфорированной передней панелью и четырьмя предустановленными вентиляторами. Это создает сквозной обдув всех внутренних компонентов, предотвращая накопление горячего воздуха от видеокарты, что жизненно важно для стабильности системы во время многочасового рендеринга.</text:p>
        </text:list-item>
        <text:list-item>
          <text:p text:style-name="P19"><text:soft-page-break/>Эргономика: Продуманная конструкция позволяет удобно разместить кабели, не препятствуя охлаждению.</text:p>
        </text:list-item>
      </text:list>
      <text:p text:style-name="P20"><text:span text:style-name="T8">Сумма: </text:span><text:span text:style-name="T9"> </text:span><text:span text:style-name="Strong_20_Emphasis"><text:span text:style-name="T10">≈</text:span></text:span><text:span text:style-name="T11"> </text:span><text:span text:style-name="T12">130</text:span><text:span text:style-name="T13"> 000 </text:span><text:span text:style-name="T14">₽</text:span></text:p>
      <text:p text:style-name="P21"><text:span text:style-name="T15">3</text:span><text:span text:style-name="T16">D</text:span><text:span text:style-name="T1">-</text:span><text:span text:style-name="T17">Р</text:span><text:span text:style-name="T2">азработчик</text:span></text:p>
      <text:h text:style-name="P22" text:outline-level="1"/>
      <text:h text:style-name="P14" text:outline-level="2">1. Центральный процессор: AMD Ryzen 5 5600</text:h>
      <text:list text:style-name="L9">
        <text:list-item>
          <text:p text:style-name="P23">Архитектурные преимущества: Процессор на базе архитектуры Zen 3 с 6 ядрами и 12 вычислительными потоками является оптимальным решением для рабочих станций 3D-моделирования. Высокая производительность на одно ядро критически важна для работы вьюпорта в Blender, Maya и 3ds Max, обеспечивая плавное взаимодействие со сложными геометрическими объектами.</text:p>
        </text:list-item>
        <text:list-item>
          <text:p text:style-name="P23">Многозадачность: 12 потоков позволяют эффективно распределять нагрузку при симуляции физики, деформации мешей и фоновых процессах запекания ассетов.</text:p>
        </text:list-item>
        <text:list-item>
          <text:p text:style-name="P23">Экономическая обоснованность: Выбор данной модели позволяет направить существенную часть бюджета на графическую подсистему и систему хранения данных, что дает более выраженный прирост производительности в профессиональном ПО по сравнению с переходом на дорогостоящие флагманские CPU.</text:p>
        </text:list-item>
      </text:list>
      <text:h text:style-name="P14" text:outline-level="2">2. Видеокарта: MSI NVIDIA GeForce RTX 4070 VENTUS 2X OC (12GB)</text:h>
      <text:list text:style-name="L10">
        <text:list-item>
          <text:p text:style-name="P24">Аппаратное ускорение рендеринга: В сфере 3D-дизайна видеокарты NVIDIA являются безальтернативным стандартом благодаря ядрам CUDA и RT. Технология OptiX позволяет использовать аппаратную трассировку лучей, что ускоряет финальный рендер сцен в разы по сравнению с любыми другими решениями.</text:p>
        </text:list-item>
        <text:list-item>
          <text:p text:style-name="P24">Объем видеопамяти (12 ГБ): Это критический параметр для работы с высокополигональными сценами и текстурными сетами высокого разрешения (4K/8K). Наличие 12 ГБ VRAM исключает ошибки нехватки памяти (Out of Memory) при работе в Substance Painter и движках рендеринга.</text:p>
        </text:list-item>
        <text:list-item>
          <text:p text:style-name="P24">Надежность бренда: Серия Ventus от MSI выбрана за качественную компонентную базу и эффективную систему охлаждения, рассчитанную на длительную эксплуатацию под нагрузкой.</text:p>
        </text:list-item>
      </text:list>
      <text:h text:style-name="P14" text:outline-level="2">3. Система охлаждения процессора: ID-Cooling SE-224-XTS</text:h>
      <text:list text:continue-list="list833673515" text:style-name="L7">
        <text:list-item>
          <text:p text:style-name="P25">Терморегуляция и ресурс: В отличие от стандартных решений, башенный кулер с четырьмя медными тепловыми трубками обеспечивает эффективный отвод тепла при длительных вычислительных нагрузках.</text:p>
        </text:list-item>
        <text:list-item>
          <text:p text:style-name="P25">Стабильность частот: Качественное охлаждение предотвращает троттлинг (сброс частот процессора при нагреве), что гарантирует стабильно высокую производительность на протяжении всего процесса работы над сложной сценой.</text:p>
        </text:list-item>
      </text:list>
      <text:h text:style-name="P14" text:outline-level="2"><text:soft-page-break/>4. Оперативная память: 32GB DDR4 3200MHz (2x16GB Kit) Kingston FURY Beast</text:h>
      <text:list text:style-name="L11">
        <text:list-item>
          <text:p text:style-name="P26">Профессиональный стандарт: Объем 32 ГБ является необходимым для комфортной работы в современных пайплайнах. Это позволяет одновременно держать запущенными пакет моделирования, софт для текстурирования и движок для визуализации без использования файла подкачки.</text:p>
        </text:list-item>
        <text:list-item>
          <text:p text:style-name="P26">Двухканальный режим: Использование комплекта из двух модулей (Kit) удваивает пропускную способность памяти, что напрямую влияет на скорость взаимодействия процессора с тяжелыми сценами и массивами данных.</text:p>
        </text:list-item>
      </text:list>
      <text:h text:style-name="P14" text:outline-level="2">5. Материнская плата: MSI B550M PRO-VDH WIFI</text:h>
      <text:list text:style-name="L12">
        <text:list-item>
          <text:p text:style-name="P27">Высокая надежность: Плата оснащена радиаторами на цепях питания (VRM), что критично при длительных рендер-сессиях. Поддержка интерфейса PCIe 4.0 гарантирует отсутствие «бутылочного горлышка» при обмене данными между видеокартой и накопителем.</text:p>
        </text:list-item>
        <text:list-item>
          <text:p text:style-name="P27">Функциональность: Встроенный модуль Wi-Fi обеспечивает гибкость в организации рабочего пространства и стабильный доступ к облачным библиотекам ассетов.</text:p>
        </text:list-item>
      </text:list>
      <text:h text:style-name="P14" text:outline-level="2">6. Накопитель: 1TB NVMe M.2 SSD Kingston KC3000</text:h>
      <text:list text:style-name="L13">
        <text:list-item>
          <text:p text:style-name="P28"><text:span text:style-name="T18">Экстремальные скорости: Выбрана флагманская модель со скоростями до 7000 МБ/с. В 3D-разработке это радикально ускоряет работу с кэшем симуляций, импорт тяжелых</text:span> <text:span text:style-name="T18">моделей и процесс автосохранения файлов, которые могут весить несколько гигабайт.</text:span></text:p>
        </text:list-item>
        <text:list-item>
          <text:p text:style-name="P29">Долговечность: Использование высокоскоростной памяти обеспечивает большой ресурс перезаписи (TBW), что важно при постоянной работе с временными файлами проектов.</text:p>
        </text:list-item>
      </text:list>
      <text:h text:style-name="P14" text:outline-level="2">7. Корпус: Deepcool CC560 V2</text:h>
      <text:list text:continue-list="list2853936058" text:style-name="L8">
        <text:list-item>
          <text:p text:style-name="P30">Воздушный поток (Airflow): Корпус оснащен перфорированной передней панелью и четырьмя предустановленными вентиляторами. Это создает сквозной обдув всех внутренних компонентов, предотвращая накопление горячего воздуха от видеокарты, что жизненно важно для стабильности системы во время многочасового рендеринга.</text:p>
        </text:list-item>
        <text:list-item>
          <text:p text:style-name="P30">Эргономика: Продуманная конструкция позволяет удобно разместить кабели, не препятствуя охлаждению.</text:p>
        </text:list-item>
      </text:list>
      <text:h text:style-name="P14" text:outline-level="2">8. Блок питания: Deepcool PK650D (650W, 80+ Bronze)</text:h>
      <text:list text:style-name="L14">
        <text:list-item>
          <text:p text:style-name="P31">Защита и стабильность: Блок питания мощностью 650 Вт работает с существенным запасом, что гарантирует тихую работу и высокий КПД. Наличие современных защит предохраняет дорогостоящие комплектующие от нестабильности электросети, обеспечивая сохранность результатов работы разработчика.</text:p>
        </text:list-item>
      </text:list>
      <text:p text:style-name="P20"><text:span text:style-name="T19">Сумма: </text:span><text:span text:style-name="T9"> </text:span><text:span text:style-name="Strong_20_Emphasis"><text:span text:style-name="T10">≈</text:span></text:span><text:span text:style-name="T11"> </text:span><text:span text:style-name="T20">130</text:span><text:span text:style-name="T21"> 000 </text:span><text:span text:style-name="T14">₽</text:span></text:p>
      <text:p text:style-name="P32">Левел-дизайнер</text:p>
      <text:p text:style-name="P33"><text:span text:style-name="T22">Модель: </text:span><text:span text:style-name="T23">Apple MacBook Air 13 (2025) M4 10-CPU, 10-GPU, 16ГБ/512ГБ SSD</text:span><text:span text:style-name="T24"> </text:span></text:p>
      <text:p text:style-name="P34"><text:soft-page-break/><text:span text:style-name="T25">1. Пиковая производительность и аппаратное ускорение (M4 Chip)</text:span> Новейшая архитектура чипа M4 с 10-ядерным процессором (CPU) и 10-ядерным графическим процессором (GPU) обеспечивает до 2-х раз большую производительность по сравнению с чипами первого поколения (M1). Наличие <text:span text:style-name="T25">аппаратного ускорения трассировки лучей</text:span> и мощного 16-ядерного нейронного движка (Neural Engine) позволяет эффективно работать с инструментами на базе ИИ и сложной визуализацией данных, что делает устройство актуальным на весь срок реализации проекта.</text:p>
      <text:p text:style-name="P35"><text:span text:style-name="T25">2. Улучшенный дисплей Liquid Retina</text:span> Дисплей Liquid Retina с увеличенной яркостью (до 500 нит) и поддержкой 1 миллиарда цветов (P3) обеспечивает эталонную четкость шрифтов и изображений. Это критически важно для работы с визуальными референсами и минимизации нагрузки на зрение при длительном чтении и написании текстов.</text:p>
      <text:p text:style-name="P36">3. Оптимизированный объем памяти и хранения (16ГБ / 512ГБ)</text:p>
      <text:list text:style-name="L15">
        <text:list-item>
          <text:p text:style-name="P37"><text:span text:style-name="T25">16 ГБ объединенной памяти:</text:span> Является необходимым стандартом для плавной многозадачности в 2026 году. Это позволяет мгновенно переключаться между ресурсоемкими приложениями без задержек.</text:p>
        </text:list-item>
        <text:list-item>
          <text:p text:style-name="P37"><text:span text:style-name="T25">512 ГБ SSD:</text:span> Обеспечивает высокую скорость обмена данными и достаточный объем для локального хранения медиатек и проектной документации без необходимости постоянного обращения к облачным сервисам.</text:p>
        </text:list-item>
      </text:list>
      <text:p text:style-name="P35"><text:span text:style-name="T25">4. Полная бесшумность и пассивное охлаждение</text:span> Несмотря на возросшую мощность, MacBook Air сохраняет <text:span text:style-name="T25">безвентиляторную конструкцию</text:span>. Это гарантирует нулевой уровень шумового загрязнения рабочего пространства, что является ключевым фактором для поддержания высокой концентрации специалиста.</text:p>
      <text:p text:style-name="P35"><text:span text:style-name="T25">5. Современные интерфейсы и мобильность</text:span> Поддержка <text:span text:style-name="T25">Thunderbolt 4</text:span> и новейших протоколов связи (Wi-Fi 6E / Bluetooth 5.3) обеспечивает быструю интеграцию в рабочую сеть студии и подключение внешних мониторов высокого разрешения. Вес устройства (1.24 кг) и автономность до 18 часов делают его максимально мобильным инструментом для внутрикомандного взаимодействия.</text:p>
      <text:p text:style-name="P34"/>
      <text:p text:style-name="P20"><text:span text:style-name="T26">Сумма: </text:span><text:span text:style-name="T9"> </text:span><text:span text:style-name="Strong_20_Emphasis"><text:span text:style-name="T10">≈</text:span></text:span><text:span text:style-name="T11"> </text:span><text:span text:style-name="T27">100 000</text:span><text:span text:style-name="T13"> </text:span><text:span text:style-name="T14">₽</text:span></text:p>
      <text:p text:style-name="P38">Team Lead</text:p>
      <text:p text:style-name="P38"><text:span text:style-name="T28">Модель: </text:span>Lenovo ThinkPad X1 Carbon Gen 14 </text:p>
      <text:p text:style-name="P39"><text:span text:style-name="T25">1. Процессор нового поколения с поддержкой ИИ (Intel Core Ultra Series 3)</text:span> Устройство оснащено новейшим процессором Intel Core Ultra (Series 3) с выделенным нейронным процессором (NPU). Это позволяет эффективно использовать ИИ-ассистенты для анализа кода, автоматизации отчетности и протоколирования совещаний. Мощность процессора гарантирует мгновенную работу в режиме экстремальной многозадачности .</text:p>
      <text:p text:style-name="P35"><text:span text:style-name="T25">2. Исключительная мобильность при высокой прочности (Carbon Fiber)</text:span> Корпус, выполненный из углеродного волокна, обеспечивает вес менее <text:span text:style-name="T25">1 кг (996 г)</text:span>. Это критически важно для тимлида, чья роль подразумевает постоянную мобильность, участие в совещаниях и кросс-департаментное взаимодействие. При этом устройство сертифицировано по военным <text:soft-page-break/>стандартам <text:span text:style-name="T25">MIL-STD 810H</text:span>, что гарантирует устойчивость к механическим повреждениям и долговечность.</text:p>
      <text:p text:style-name="P35"><text:span text:style-name="T25">3. Профессиональный стандарт ввода и навигации</text:span> Клавиатура ThinkPad признана эталонной в индустрии. Она минимизирует количество опечаток и усталость рук при ведении активной переписки и техническом документировании. Наличие увеличенного тактильного тачпада и фирменного манипулятора TrackPoint позволяет эффективно управлять интерфейсом в любых условиях без необходимости подключения внешней периферии.</text:p>
      <text:p text:style-name="P35"><text:span text:style-name="T25">4. Экран 2.8K OLED с защитой зрения</text:span> 14-дюймовый OLED-дисплей с частотой обновления 120 Гц и яркостью 500 нит обеспечивает идеальную четкость текста и графиков. Технология <text:span text:style-name="T25">Eyesafe</text:span> снижает интенсивность синего света, что позволяет специалисту сохранять продуктивность в течение длительного рабочего дня без вреда для зрения.</text:p>
      <text:p text:style-name="P36">5. Интерфейсы и безопасность (Enterprise Ready)</text:p>
      <text:list text:style-name="L16">
        <text:list-item>
          <text:p text:style-name="P40"><text:span text:style-name="T25">Thunderbolt 4:</text:span> Позволяет подключать до двух мониторов 4K через один кабель, превращая ноутбук в полноценное стационарное рабочее место.</text:p>
        </text:list-item>
        <text:list-item>
          <text:p text:style-name="P40"><text:span text:style-name="T25">Безопасность:</text:span> Аппаратный комплекс <text:span text:style-name="T25">ThinkShield</text:span>, сканер отпечатков пальцев и ИК-камера с физической шторкой приватности обеспечивают защиту интеллектуальной собственности и конфиденциальность переписки.</text:p>
        </text:list-item>
        <text:list-item>
          <text:p text:style-name="P40"><text:span text:style-name="T25">Wi-Fi 7:</text:span> Поддержка новейшего стандарта связи гарантирует бесперебойную работу в условиях высокой загрузки беспроводных сетей студии.</text:p>
        </text:list-item>
      </text:list>
      <text:p text:style-name="P41"><text:span text:style-name="T25">6. Автономность и зарядка</text:span> Благодаря оптимизированной энергоэффективности платформы, ноутбук обеспечивает полный рабочий день автономной работы. Поддержка быстрой зарядки (Rapid Charge) позволяет восполнить заряд до 80% всего за 60 минут, что критично при плотном графике встреч</text:p>
      <text:p text:style-name="P42"><text:span text:style-name="T26">Сумма: </text:span><text:span text:style-name="T9"> </text:span><text:span text:style-name="Strong_20_Emphasis"><text:span text:style-name="T10">≈</text:span></text:span><text:span text:style-name="T11"> </text:span><text:span text:style-name="T29">255 990</text:span><text:span text:style-name="T13"> </text:span><text:span text:style-name="T30">₽</text:span><text:span text:style-name="T11">.</text:span></text:p>
      <text:p text:style-name="P39"/>
      <text:h text:style-name="P43" text:outline-level="1"><text:span text:style-name="T4">Операционная система Microsoft Windows 11 </text:span><text:span text:style-name="T31">pro</text:span><text:span text:style-name="T4">(4 штуки)</text:span><text:span text:style-name="T32">:</text:span></text:h>
      <text:h text:style-name="P44" text:outline-level="4">1. Совместимость с профессиональным ПО (DAW и Движки)</text:h>
      <text:list text:style-name="WWNum11">
        <text:list-item>
          <text:p text:style-name="P45">Саунд-дизайн: Почти все профессиональные плагины (VST) и программы (Ableton, FL Studio) написаны под Windows/macOS. На российских ОС (Linux) их запуск через эмуляторы приводит к задержкам звука, что недопустимо для работы.</text:p>
        </text:list-item>
        <text:list-item>
          <text:p text:style-name="P45">Геймдев: Unity и Unreal Engine работают на Windows максимально стабильно. Большинство ассетов и плагинов в магазине Unity Store заточены под Windows-разработку.</text:p>
        </text:list-item>
      </text:list>
      <text:h text:style-name="P44" text:outline-level="4">2. Драйверы и оборудование</text:h>
      <text:list text:style-name="WWNum12">
        <text:list-item>
          <text:p text:style-name="P46">Для Tecno и других новых брендов драйверы пишутся в первую очередь под Windows 11. Всё оборудование ноутбука (тачпад, функциональные клавиши, звуковая карта) будет работать «из коробки». В Linux-системах настройка звука для саунд-дизайна может потребовать недель поиска специфических драйверов.</text:p>
        </text:list-item>
      </text:list>
      <text:h text:style-name="P44" text:outline-level="4"><text:soft-page-break/>3. Стандарт индустрии</text:h>
      <text:list text:style-name="WWNum13">
        <text:list-item>
          <text:p text:style-name="P47"><text:span text:style-name="T33">Н</text:span><text:span text:style-name="T34">аши 3D-моделлеры и программисты используют Windows. Обмен файлами, работа в Figma и сборка проекта в Unity пройдут без багов, связанных с разностью файловых систем или шрифтов.</text:span></text:p>
        </text:list-item>
      </text:list>
      <text:p text:style-name="P48"/>
      <text:h text:style-name="P43" text:outline-level="1"><text:span text:style-name="T18">Сумма: </text:span><text:span text:style-name="T15">15 560</text:span><text:span text:style-name="T18"> </text:span><text:span text:style-name="T35">₽</text:span></text:h>
      <text:p text:style-name="P49"/>
      <text:h text:style-name="P50" text:outline-level="3">аренд<text:span text:style-name="T36">а</text:span> офиса в Красноярске</text:h>
      <text:list text:style-name="L17">
        <text:list-item>
          <text:p text:style-name="P51">Требование: Офис минимум 30 кв. м.</text:p>
        </text:list-item>
        <text:list-item>
          <text:p text:style-name="P51">Ежемесячный платеж: 30 кв. м × 850 руб. = 25 500 руб./мес. (Округлим до 30 000 руб./мес. с учетом интернета и коммуналки).</text:p>
        </text:list-item>
        <text:list-item>
          <text:p text:style-name="P51">Итого за 5 месяцев: 30 000 руб. × 5 месяцев = 150 000 руб.</text:p>
        </text:list-item>
      </text:list>
      <text:h text:style-name="P52" text:outline-level="1"><text:span text:style-name="T18">Сумма: </text:span><text:span text:style-name="T37">150 000 </text:span><text:span text:style-name="T35">₽</text:span></text:h>
      <text:p text:style-name="P53"/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54">№ п/п</text:p>
          </table:table-cell>
          <table:table-cell table:style-name="Таблица1.A1" office:value-type="string">
            <text:p text:style-name="P54">Наименование</text:p>
          </table:table-cell>
          <table:table-cell table:style-name="Таблица1.A1" office:value-type="string">
            <text:p text:style-name="P54">Ед. измерения</text:p>
          </table:table-cell>
          <table:table-cell table:style-name="Таблица1.A1" office:value-type="string">
            <text:p text:style-name="P54">Цена за единицу, руб.</text:p>
          </table:table-cell>
          <table:table-cell table:style-name="Таблица1.A1" office:value-type="string">
            <text:p text:style-name="P54">Кол-во</text:p>
          </table:table-cell>
          <table:table-cell table:style-name="Таблица1.A1" office:value-type="string">
            <text:p text:style-name="P54">Источник финансирования 1, руб.</text:p>
          </table:table-cell>
          <table:table-cell table:style-name="Таблица1.A1" office:value-type="string">
            <text:p text:style-name="P54">Источник финансирования 2, руб.</text:p>
          </table:table-cell>
          <table:table-cell table:style-name="Таблица1.H1" office:value-type="string">
            <text:p text:style-name="P54">ИТОГО, по всем источникам, руб.</text:p>
          </table:table-cell>
        </table:table-row>
        <table:table-row>
          <table:table-cell table:style-name="Таблица1.A1" office:value-type="string">
            <text:p text:style-name="P54">1</text:p>
          </table:table-cell>
          <table:table-cell table:style-name="Таблица1.A1" office:value-type="string">
            <text:p text:style-name="P54">Программирование игрового процесса и логики MVP </text:p>
          </table:table-cell>
          <table:table-cell table:style-name="Таблица1.A1" office:value-type="string">
            <text:p text:style-name="P54">Час / работа</text:p>
          </table:table-cell>
          <table:table-cell table:style-name="Таблица1.A1" office:value-type="string">
            <text:p text:style-name="P54">593,75</text:p>
          </table:table-cell>
          <table:table-cell table:style-name="Таблица1.A1" office:value-type="string">
            <text:p text:style-name="P54">800 (задачи на 5 мес., по 8 ч/день)</text:p>
          </table:table-cell>
          <table:table-cell table:style-name="Таблица1.A1" office:value-type="string">
            <text:p text:style-name="P54">175 000</text:p>
          </table:table-cell>
          <table:table-cell table:style-name="Таблица1.A1" office:value-type="string">
            <text:p text:style-name="P54">300 000</text:p>
          </table:table-cell>
          <table:table-cell table:style-name="Таблица1.H1" office:value-type="string">
            <text:p text:style-name="P54">475 000 (593,75х800)</text:p>
          </table:table-cell>
        </table:table-row>
        <table:table-row>
          <table:table-cell table:style-name="Таблица1.A1" office:value-type="string">
            <text:p text:style-name="P54">2</text:p>
          </table:table-cell>
          <table:table-cell table:style-name="Таблица1.A1" office:value-type="string">
            <text:p text:style-name="P54">Разработка и оптимизация 3D-моделей </text:p>
          </table:table-cell>
          <table:table-cell table:style-name="Таблица1.A1" office:value-type="string">
            <text:p text:style-name="P54">Час / работа</text:p>
          </table:table-cell>
          <table:table-cell table:style-name="Таблица1.A1" office:value-type="string">
            <text:p text:style-name="P54">531,25</text:p>
          </table:table-cell>
          <table:table-cell table:style-name="Таблица1.A1" office:value-type="string">
            <text:p text:style-name="P54">800 (задачи на 5 мес., по 8 ч/день)</text:p>
          </table:table-cell>
          <table:table-cell table:style-name="Таблица1.A1" office:value-type="string">
            <text:p text:style-name="P54">125 000</text:p>
          </table:table-cell>
          <table:table-cell table:style-name="Таблица1.A1" office:value-type="string">
            <text:p text:style-name="P54">300 000</text:p>
          </table:table-cell>
          <table:table-cell table:style-name="Таблица1.H1" office:value-type="string">
            <text:p text:style-name="P54">425 000 (531,25х800)</text:p>
          </table:table-cell>
        </table:table-row>
        <table:table-row>
          <table:table-cell table:style-name="Таблица1.A1" office:value-type="string">
            <text:p text:style-name="P54">3</text:p>
          </table:table-cell>
          <table:table-cell table:style-name="Таблица1.A1" office:value-type="string">
            <text:p text:style-name="P54">Управление проектом и ведение проектной документации </text:p>
          </table:table-cell>
          <table:table-cell table:style-name="Таблица1.A1" office:value-type="string">
            <text:p text:style-name="P54">Час / работа</text:p>
          </table:table-cell>
          <table:table-cell table:style-name="Таблица1.A1" office:value-type="string">
            <text:p text:style-name="P54">375</text:p>
          </table:table-cell>
          <table:table-cell table:style-name="Таблица1.A1" office:value-type="string">
            <text:p text:style-name="P54">800 (задачи на 5 мес., по 8 ч/день)</text:p>
          </table:table-cell>
          <table:table-cell table:style-name="Таблица1.A1" office:value-type="string">
            <text:p text:style-name="P54">100 000</text:p>
          </table:table-cell>
          <table:table-cell table:style-name="Таблица1.A1" office:value-type="string">
            <text:p text:style-name="P54">200 000</text:p>
          </table:table-cell>
          <table:table-cell table:style-name="Таблица1.H1" office:value-type="string">
            <text:p text:style-name="P54">300 000 (375х800)</text:p>
          </table:table-cell>
        </table:table-row>
        <table:table-row>
          <table:table-cell table:style-name="Таблица1.A1" office:value-type="string">
            <text:p text:style-name="P54">4</text:p>
          </table:table-cell>
          <table:table-cell table:style-name="Таблица1.A1" office:value-type="string">
            <text:p text:style-name="P54">Проектирование уровней и игровых механик </text:p>
          </table:table-cell>
          <table:table-cell table:style-name="Таблица1.A1" office:value-type="string">
            <text:p text:style-name="P54">Час / работа</text:p>
          </table:table-cell>
          <table:table-cell table:style-name="Таблица1.A1" office:value-type="string">
            <text:p text:style-name="P54">375</text:p>
          </table:table-cell>
          <table:table-cell table:style-name="Таблица1.A1" office:value-type="string">
            <text:p text:style-name="P54">800 (задачи на 5 мес., по 8 ч/день)</text:p>
          </table:table-cell>
          <table:table-cell table:style-name="Таблица1.A1" office:value-type="string">
            <text:p text:style-name="P54">100 000</text:p>
          </table:table-cell>
          <table:table-cell table:style-name="Таблица1.A1" office:value-type="string">
            <text:p text:style-name="P54">200 000</text:p>
          </table:table-cell>
          <table:table-cell table:style-name="Таблица1.H1" office:value-type="string">
            <text:p text:style-name="P54">300 000 (375х800)</text:p>
          </table:table-cell>
        </table:table-row>
        <table:table-row>
          <table:table-cell table:style-name="Таблица1.A1" office:value-type="string">
            <text:p text:style-name="P54"/>
          </table:table-cell>
          <table:table-cell table:style-name="Таблица1.H1" office:value-type="string">
            <text:p text:style-name="P54">ВСЕГО по смете:</text:p>
          </table:table-cell>
          <table:table-cell table:style-name="Таблица1.A1" office:value-type="string">
            <text:p text:style-name="P54"/>
          </table:table-cell>
          <table:table-cell table:style-name="Таблица1.A1" office:value-type="string">
            <text:p text:style-name="P54"/>
          </table:table-cell>
          <table:table-cell table:style-name="Таблица1.A1" office:value-type="string">
            <text:p text:style-name="P54"/>
          </table:table-cell>
          <table:table-cell table:style-name="Таблица1.A1" office:value-type="string">
            <text:p text:style-name="P54">500 000</text:p>
          </table:table-cell>
          <table:table-cell table:style-name="Таблица1.A1" office:value-type="string">
            <text:p text:style-name="P54">1 000 000</text:p>
          </table:table-cell>
          <table:table-cell table:style-name="Таблица1.A1" office:value-type="string">
            <text:p text:style-name="P55">1 500 000</text:p>
          </table:table-cell>
        </table:table-row>
      </table:table>
      <text:p text:style-name="P53"/>
      <text:p text:style-name="P53"/>
      <text:p text:style-name="P56"><text:span text:style-name="T38">Общая сумма: </text:span><text:span text:style-name="Strong_20_Emphasis"><text:span text:style-name="T39">≈</text:span></text:span><text:span text:style-name="Strong_20_Emphasis"><text:span text:style-name="T40"> </text:span></text:span><text:span text:style-name="Strong_20_Emphasis"><text:span text:style-name="T41">2 281 500</text:span></text:span><text:span text:style-name="Strong_20_Emphasis"><text:span text:style-name="T42"> ₽</text:span></text:span></text:p>
      <text:h text:style-name="P57" text:outline-level="3">Пояснительная записка к расчетам</text:h>
      <text:p text:style-name="P58">Как мы считали эту смету:</text:p>
      <text:p text:style-name="P58">В таблице <text:span text:style-name="T43">выше</text:span> мы расписали «идеальный» вариант: как будто у нас полноценный коммерческий проект, <text:span text:style-name="T44">закупаем железо без ограничений</text:span>, нам кто-то даёт на него <text:soft-page-break/>деньги, мы снимаем нормальный офис в Красноярске и платим всем средние зарплаты по рынку на целых 5 месяцев (с 24 февраля по 24 июля). Но если бы этот проект запускался в реальности, мы бы спокойно могли сильно сэкономить и урезать этот бюджет почти наполовину:</text:p>
      <text:list text:style-name="L18">
        <text:list-item>
          <text:p text:style-name="P59">Работать из дома (без офиса): Нам не обязательно снимать помещение и покупать туда компьютеры. Мы спокойно можем делать игру удаленно со своих домашних <text:span text:style-name="T43">ноутов/компьютеров</text:span>. Это сразу вычёркивает из трат аренду и коммуналку <text:span text:style-name="T44">и оборудование</text:span>.</text:p>
        </text:list-item>
        <text:list-item>
          <text:p text:style-name="P59">Снизить зарплаты на <text:span text:style-name="T43">40-45</text:span>% ради опыта: У нас в команде сейчас нет коммерческого опыта разработки игр. Для нас главное — сделать играбельное MVP, получить <text:span text:style-name="T43">опыт разработки</text:span> и научиться работать вместе. Поэтому ради реального опыта мы бы согласились получать зарплату на <text:span text:style-name="T43">40-45</text:span>% меньше, чем написано в смете.</text:p>
        </text:list-item>
      </text:list>
      <text:p text:style-name="P60"><text:span text:style-name="T38">Общая сумма: </text:span><text:span text:style-name="Strong_20_Emphasis"><text:span text:style-name="T39">≈</text:span></text:span><text:span text:style-name="Strong_20_Emphasis"><text:span text:style-name="T40"> </text:span></text:span><text:span text:style-name="Strong_20_Emphasis"><text:span text:style-name="T45">675 000</text:span></text:span><text:span text:style-name="Strong_20_Emphasis"><text:span text:style-name="T42"> ₽ </text:span></text:span><text:span text:style-name="Strong_20_Emphasis"><text:span text:style-name="T46">(с учетом выше сказанного)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Заголовок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Заголовок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Маркеры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Исходный_20_текст" style:display-name="Исходный текст" style:family="text">
      <style:text-properties style:font-name="Liberation Mono1" fo:font-family="'Liberation Mono'" style:font-family-generic="roman" style:font-pitch="variable" style:font-name-asian="NSimSun1" style:font-family-asian="NSimSun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20:31:44</meta:creation-date>
    <dc:language>ru-RU</dc:language>
    <dc:date>2026-06-20T21:45:13.972378900</dc:date>
    <meta:editing-cycles>4</meta:editing-cycles>
    <meta:editing-duration>PT21M15S</meta:editing-duration>
    <meta:generator>LibreOffice/26.2.0.3$Windows_X86_64 LibreOffice_project/620$Build-3</meta:generator>
    <meta:document-statistic meta:table-count="1" meta:image-count="0" meta:object-count="0" meta:page-count="8" meta:paragraph-count="143" meta:word-count="2288" meta:character-count="16780" meta:non-whitespace-character-count="14669"/>
    <meta:user-defined meta:name="AppVersion">15.0000</meta:user-defined>
  </office:meta>
</office:document-meta>
</file>