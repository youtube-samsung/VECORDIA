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5" style:family="table">
      <style:table-properties style:width="18.309cm" fo:margin-left="0.09cm" fo:margin-top="0cm" fo:margin-bottom="0cm" table:align="left" style:writing-mode="page"/>
    </style:style>
    <style:style style:name="Таблица5.A" style:family="table-column">
      <style:table-column-properties style:column-width="2.09cm"/>
    </style:style>
    <style:style style:name="Таблица5.B" style:family="table-column">
      <style:table-column-properties style:column-width="16.21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4.302cm" fo:keep-together="auto"/>
    </style:style>
    <style:style style:name="Таблица5.8" style:family="table-row">
      <style:table-row-properties style:min-row-height="1.744cm" fo:keep-together="auto"/>
    </style:style>
    <style:style style:name="Таблица2" style:family="table">
      <style:table-properties style:width="18.521cm" fo:margin-left="-0.122cm" fo:margin-top="0cm" fo:margin-bottom="0cm" table:align="left" style:writing-mode="page"/>
    </style:style>
    <style:style style:name="Таблица2.A" style:family="table-column">
      <style:table-column-properties style:column-width="2.302cm"/>
    </style:style>
    <style:style style:name="Таблица2.B" style:family="table-column">
      <style:table-column-properties style:column-width="16.21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2" style:family="table-row">
      <style:table-row-properties style:min-row-height="1.418cm" fo:keep-together="auto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7" style:family="table-row">
      <style:table-row-properties style:min-row-height="4.302cm" fo:keep-together="auto"/>
    </style:style>
    <style:style style:name="Таблица2.9" style:family="table-row">
      <style:table-row-properties style:min-row-height="1.744cm" fo:keep-together="auto"/>
    </style:style>
    <style:style style:name="Таблица2.10" style:family="table-row">
      <style:table-row-properties style:min-row-height="0.61cm" fo:keep-together="auto"/>
    </style:style>
    <style:style style:name="Таблица1" style:family="table">
      <style:table-properties style:width="18.403cm" fo:margin-left="0cm" table:align="left" style:may-break-between-rows="true" style:writing-mode="lr-tb" table:border-model="collapsing"/>
    </style:style>
    <style:style style:name="Таблица1.A" style:family="table-column">
      <style:table-column-properties style:column-width="2.293cm"/>
    </style:style>
    <style:style style:name="Таблица1.B" style:family="table-column">
      <style:table-column-properties style:column-width="16.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left" style:justify-single-word="false"/>
      <style:text-properties style:font-name="Times New Roman" officeooo:paragraph-rsid="00146a61"/>
    </style:style>
    <style:style style:name="P2" style:family="paragraph" style:parent-style-name="Text_20_body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3" style:family="paragraph" style:parent-style-name="Text_20_body" style:list-style-name="L1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4" style:family="paragraph" style:parent-style-name="Standard">
      <style:paragraph-properties fo:text-align="left" style:justify-single-word="false"/>
      <style:text-properties style:font-name="Times New Roman" fo:font-size="13pt" fo:language="ru" fo:country="RU" officeooo:rsid="00146a61" officeooo:paragraph-rsid="00146a61" style:font-size-asian="13pt" style:font-size-complex="13pt"/>
    </style:style>
    <style:style style:name="P5" style:family="paragraph" style:parent-style-name="Table_20_Contents">
      <style:paragraph-properties fo:text-align="left" style:justify-single-word="false" fo:orphans="2" fo:widows="2"/>
      <style:text-properties style:font-name="Times New Roman" fo:font-size="13pt" officeooo:paragraph-rsid="00146a61" style:font-size-asian="13pt" style:font-size-complex="13pt"/>
    </style:style>
    <style:style style:name="P6" style:family="paragraph" style:parent-style-name="Table_20_Contents">
      <style:paragraph-properties fo:text-align="left" style:justify-single-word="false"/>
      <style:text-properties officeooo:paragraph-rsid="00146a61"/>
    </style:style>
    <style:style style:name="P7" style:family="paragraph" style:parent-style-name="Table_20_Contents">
      <style:paragraph-properties fo:text-align="left" style:justify-single-word="false" fo:orphans="2" fo:widows="2"/>
      <style:text-properties officeooo:paragraph-rsid="00146a61"/>
    </style:style>
    <style:style style:name="P8" style:family="paragraph" style:parent-style-name="Table_20_Contents">
      <style:paragraph-properties fo:text-align="left" style:justify-single-word="false" fo:orphans="2" fo:widows="2"/>
      <style:text-properties fo:color="#0f1115" loext:opacity="100%" style:font-name="Times New Roman" fo:font-size="13pt" officeooo:paragraph-rsid="00146a61" style:font-size-asian="13pt" style:font-size-complex="13pt"/>
    </style:style>
    <style:style style:name="P9" style:family="paragraph" style:parent-style-name="Table_20_Contents">
      <style:paragraph-properties fo:text-align="left" style:justify-single-word="false"/>
      <style:text-properties style:font-name="Times New Roman" fo:font-size="13pt" officeooo:paragraph-rsid="00146a61" style:font-size-asian="13pt" style:font-size-complex="13pt"/>
    </style:style>
    <style:style style:name="P10" style:family="paragraph" style:parent-style-name="Table_20_Contents">
      <style:paragraph-properties fo:text-align="left" style:justify-single-word="false"/>
      <style:text-properties style:font-name="Times New Roman" fo:font-size="13pt" officeooo:rsid="0011735b" officeooo:paragraph-rsid="00146a61" style:font-size-asian="13pt" style:font-size-complex="13pt"/>
    </style:style>
    <style:style style:name="P11" style:family="paragraph" style:parent-style-name="Standard">
      <style:paragraph-properties fo:text-align="left" style:justify-single-word="false"/>
      <style:text-properties style:font-name="Times New Roman" fo:font-size="13pt" officeooo:rsid="00146a61" officeooo:paragraph-rsid="00146a61" style:font-size-asian="13pt" style:font-size-complex="13pt"/>
    </style:style>
    <style:style style:name="P12" style:family="paragraph" style:parent-style-name="Standard">
      <style:paragraph-properties fo:text-align="left" style:justify-single-word="false"/>
      <style:text-properties style:font-name="Times New Roman" fo:font-size="13pt" fo:language="en" fo:country="US" officeooo:rsid="00146a61" officeooo:paragraph-rsid="00146a61" style:font-size-asian="13pt" style:font-size-complex="13pt"/>
    </style:style>
    <style:style style:name="P13" style:family="paragraph" style:parent-style-name="Table_20_Contents">
      <style:paragraph-properties fo:text-align="left" style:justify-single-word="false" fo:orphans="2" fo:widows="2"/>
      <style:text-properties style:font-name="Times New Roman" fo:font-size="13pt" fo:language="en" fo:country="US" officeooo:rsid="00146a61" officeooo:paragraph-rsid="00146a61" style:font-size-asian="13pt" style:font-size-complex="13pt"/>
    </style:style>
    <style:style style:name="P14" style:family="paragraph" style:parent-style-name="Table_20_Contents">
      <style:paragraph-properties fo:text-align="left" style:justify-single-word="false"/>
      <style:text-properties style:font-name="Times New Roman" fo:font-size="13pt" officeooo:rsid="00146a61" officeooo:paragraph-rsid="00146a61" style:font-size-asian="13pt" style:font-size-complex="13pt"/>
    </style:style>
    <style:style style:name="P15" style:family="paragraph" style:parent-style-name="Standard">
      <style:paragraph-properties fo:text-align="left" style:justify-single-word="false"/>
      <style:text-properties style:font-name="Times New Roman" fo:font-size="13pt" officeooo:paragraph-rsid="00146a61" style:font-size-asian="13pt" style:font-size-complex="13pt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officeooo:rsid="00145dad" officeooo:paragraph-rsid="00146a6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officeooo:rsid="00145dad" officeooo:paragraph-rsid="00146a6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3pt" fo:language="ru" fo:country="RU" fo:font-style="normal" fo:text-shadow="none" style:text-underline-style="none" fo:font-weight="normal" officeooo:rsid="00145dad" officeooo:paragraph-rsid="00146a6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officeooo:paragraph-rsid="00146a6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line-height="114%" fo:text-align="lef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officeooo:paragraph-rsid="00146a6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1" style:family="paragraph" style:parent-style-name="Heading_20_3">
      <style:paragraph-properties fo:text-align="left" style:justify-single-word="false"/>
      <style:text-properties style:font-name="Times New Roman" fo:font-size="13pt" fo:language="ru" fo:country="RU" officeooo:rsid="0018725c" officeooo:paragraph-rsid="0018725c" style:font-size-asian="13pt" style:font-size-complex="13pt"/>
    </style:style>
    <style:style style:name="P22" style:family="paragraph" style:parent-style-name="Heading_20_3">
      <style:paragraph-properties fo:text-align="left" style:justify-single-word="false"/>
      <style:text-properties style:font-name="Times New Roman" fo:font-size="13pt" officeooo:rsid="00146a61" officeooo:paragraph-rsid="00146a61" style:font-size-asian="13pt" style:font-size-complex="13pt"/>
    </style:style>
    <style:style style:name="P23" style:family="paragraph" style:parent-style-name="Text_20_body">
      <style:paragraph-properties fo:text-align="left" style:justify-single-word="false"/>
      <style:text-properties style:font-name="Times New Roman" fo:font-size="13pt" fo:font-style="italic" officeooo:rsid="00146a61" style:font-size-asian="13pt" style:font-size-complex="13pt"/>
    </style:style>
    <style:style style:name="P24" style:family="paragraph" style:parent-style-name="Text_20_body" style:list-style-name="L2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25" style:family="paragraph" style:parent-style-name="Text_20_body" style:list-style-name="L3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26" style:family="paragraph" style:parent-style-name="Text_20_body" style:list-style-name="L4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27" style:family="paragraph" style:parent-style-name="Text_20_body" style:list-style-name="L2">
      <style:paragraph-properties fo:text-align="left" style:justify-single-word="false"/>
      <style:text-properties style:font-name="Times New Roman" fo:font-size="13pt" officeooo:rsid="00146a61" officeooo:paragraph-rsid="001af3e5" style:font-size-asian="13pt" style:font-size-complex="13pt"/>
    </style:style>
    <style:style style:name="P28" style:family="paragraph" style:parent-style-name="Heading_20_3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29" style:family="paragraph" style:parent-style-name="Text_20_body" style:list-style-name="L5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30" style:family="paragraph" style:parent-style-name="Text_20_body" style:list-style-name="L6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31" style:family="paragraph" style:parent-style-name="Text_20_body" style:list-style-name="L6">
      <style:paragraph-properties fo:text-align="left" style:justify-single-word="false"/>
      <style:text-properties style:font-name="Times New Roman"/>
    </style:style>
    <style:style style:name="P32" style:family="paragraph" style:parent-style-name="Text_20_body">
      <style:paragraph-properties fo:text-align="left" style:justify-single-word="false"/>
      <style:text-properties style:font-name="Times New Roman" fo:font-size="13pt" fo:font-weight="bold" officeooo:rsid="00181fb2" officeooo:paragraph-rsid="00181fb2" style:font-size-asian="13pt" style:font-weight-asian="bold" style:font-size-complex="13pt" style:font-weight-complex="bold"/>
    </style:style>
    <style:style style:name="P33" style:family="paragraph" style:parent-style-name="Text_20_body" style:list-style-name="L7">
      <style:paragraph-properties fo:text-align="left" style:justify-single-word="false"/>
      <style:text-properties officeooo:rsid="00146a61"/>
    </style:style>
    <style:style style:name="P34" style:family="paragraph" style:parent-style-name="Text_20_body" style:list-style-name="L7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35" style:family="paragraph" style:parent-style-name="Text_20_body" style:list-style-name="L7">
      <style:paragraph-properties fo:text-align="left" style:justify-single-word="false"/>
      <style:text-properties style:font-name="Times New Roman" officeooo:paragraph-rsid="001fee2d"/>
    </style:style>
    <style:style style:name="P36" style:family="paragraph" style:parent-style-name="Text_20_body" style:list-style-name="L8">
      <style:paragraph-properties fo:text-align="left" style:justify-single-word="false"/>
      <style:text-properties style:font-name="Times New Roman" fo:font-size="13pt" officeooo:rsid="00146a61" style:font-size-asian="13pt" style:font-size-complex="13pt"/>
    </style:style>
    <style:style style:name="P37" style:family="paragraph" style:parent-style-name="Text_20_body" style:list-style-name="L8">
      <style:paragraph-properties fo:text-align="left" style:justify-single-word="false"/>
      <style:text-properties style:font-name="Times New Roman" fo:font-size="13pt" officeooo:rsid="00146a61" officeooo:paragraph-rsid="00181fb2" style:font-size-asian="13pt" style:font-size-complex="13pt"/>
    </style:style>
    <style:style style:name="P38" style:family="paragraph" style:parent-style-name="Text_20_body">
      <style:paragraph-properties fo:text-align="left" style:justify-single-word="false"/>
      <style:text-properties style:font-name="Times New Roman" fo:font-size="13pt" fo:font-weight="bold" officeooo:rsid="00216dbb" officeooo:paragraph-rsid="00216dbb" style:font-size-asian="13pt" style:font-weight-asian="bold" style:font-size-complex="13pt" style:font-weight-complex="bold"/>
    </style:style>
    <style:style style:name="P39" style:family="paragraph" style:parent-style-name="Text_20_body" style:list-style-name="L9">
      <style:paragraph-properties fo:margin-top="0cm" fo:margin-bottom="0cm" style:contextual-spacing="false" fo:text-align="left" style:justify-single-word="false" fo:orphans="2" fo:widows="2"/>
      <style:text-properties style:font-name="Times New Roman" officeooo:paragraph-rsid="00225282"/>
    </style:style>
    <style:style style:name="P40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Times New Roman" officeooo:paragraph-rsid="00225282"/>
    </style:style>
    <style:style style:name="P41" style:family="paragraph" style:parent-style-name="Heading_20_2">
      <style:paragraph-properties fo:text-align="left" style:justify-single-word="false"/>
      <style:text-properties style:font-name="Times New Roman" fo:font-size="13pt" officeooo:rsid="00146a61" officeooo:paragraph-rsid="00181fb2" style:font-size-asian="13pt" style:font-size-complex="13pt"/>
    </style:style>
    <style:style style:name="P42" style:family="paragraph" style:parent-style-name="Text_20_body" style:list-style-name="L10">
      <style:text-properties style:font-name="Times New Roman" fo:font-size="13pt" officeooo:rsid="00146a61" style:font-size-asian="13pt" style:font-size-complex="13pt"/>
    </style:style>
    <style:style style:name="P43" style:family="paragraph" style:parent-style-name="Text_20_body">
      <style:paragraph-properties fo:text-align="left" style:justify-single-word="false"/>
      <style:text-properties style:font-name="Times New Roman" fo:font-size="13pt" officeooo:rsid="00146a61" officeooo:paragraph-rsid="00181fb2" style:font-size-asian="13pt" style:font-size-complex="13pt"/>
    </style:style>
    <style:style style:name="T1" style:family="text">
      <style:text-properties fo:font-size="13pt" fo:language="ru" fo:country="RU" fo:font-weight="bold" officeooo:rsid="00146a61" style:font-size-asian="13pt" style:font-size-complex="13pt"/>
    </style:style>
    <style:style style:name="T2" style:family="text">
      <style:text-properties fo:font-size="13pt" fo:language="ru" fo:country="RU" officeooo:rsid="00146a61" style:font-size-asian="13pt" style:font-size-complex="13pt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1e99e3"/>
    </style:style>
    <style:style style:name="T5" style:family="text">
      <style:text-properties fo:font-weight="bold"/>
    </style:style>
    <style:style style:name="T6" style:family="text">
      <style:text-properties fo:font-size="12pt" loext:padding="0cm" loext:border="none"/>
    </style:style>
    <style:style style:name="T7" style:family="text">
      <style:text-properties fo:font-weight="bold" officeooo:rsid="001f1351"/>
    </style:style>
    <style:style style:name="T8" style:family="text">
      <style:text-properties officeooo:rsid="001f1351"/>
    </style:style>
    <style:style style:name="T9" style:family="text">
      <style:text-properties fo:font-weight="bold" officeooo:rsid="00179a18"/>
    </style:style>
    <style:style style:name="T10" style:family="text">
      <style:text-properties officeooo:rsid="00179a18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color="#0f1115" loext:opacity="100%" fo:font-weight="bold" style:font-weight-asian="bold"/>
    </style:style>
    <style:style style:name="T13" style:family="text">
      <style:text-properties fo:color="#0f1115" loext:opacity="100%" officeooo:rsid="00146a61"/>
    </style:style>
    <style:style style:name="T14" style:family="text">
      <style:text-properties fo:color="#0f1115" loext:opacity="100%"/>
    </style:style>
    <style:style style:name="T15" style:family="text">
      <style:text-properties style:font-name="Times New Roman" fo:font-size="13pt" style:font-size-asian="13pt" style:font-size-complex="13pt"/>
    </style:style>
    <style:style style:name="T1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color="#0f1115" loext:opacity="100%" style:font-name="Times New Roman" fo:font-size="13pt" style:font-size-asian="13pt" style:font-size-complex="13pt"/>
    </style:style>
    <style:style style:name="T18" style:family="text">
      <style:text-properties fo:color="#0f1115" loext:opacity="100%" style:font-name="Times New Roman" fo:font-size="13pt" fo:font-weight="normal" style:font-size-asian="13pt" style:font-weight-asian="normal" style:font-size-complex="13pt"/>
    </style:style>
    <style:style style:name="T19" style:family="text">
      <style:text-properties fo:color="#0f1115" loext:opacity="100%" fo:font-family="'quote-cjk-patch, Inter, system-'" style:font-family-generic="swiss" style:font-pitch="variable" fo:font-size="11pt" style:font-size-asian="11pt"/>
    </style:style>
    <style:style style:name="T20" style:family="text">
      <style:text-properties style:font-name="Times New Roman" fo:font-size="13pt" fo:font-weight="normal" style:font-size-asian="13pt" style:font-weight-asian="normal" style:font-size-complex="13pt"/>
    </style:style>
    <style:style style:name="T21" style:family="text">
      <style:text-properties fo:color="#0f1115" loext:opacity="100%" fo:font-family="Arial" style:font-family-generic="swiss" style:font-pitch="variable"/>
    </style:style>
    <style:style style:name="T22" style:family="text">
      <style:text-properties officeooo:rsid="00146a61"/>
    </style:style>
    <style:style style:name="T23" style:family="text">
      <style:text-properties officeooo:rsid="0018725c"/>
    </style:style>
    <style:style style:name="T24" style:family="text">
      <style:text-properties officeooo:rsid="001345a8"/>
    </style:style>
    <style:style style:name="T25" style:family="text">
      <style:text-properties fo:font-family="Arial" style:font-family-generic="swiss" style:font-pitch="variable" fo:language="en" fo:country="US"/>
    </style:style>
    <style:style style:name="T26" style:family="text">
      <style:text-properties fo:font-style="italic"/>
    </style:style>
    <style:style style:name="T27" style:family="text">
      <style:text-properties officeooo:rsid="00145dad"/>
    </style:style>
    <style:style style:name="T28" style:family="text">
      <style:text-properties fo:language="en" fo:country="US"/>
    </style:style>
    <style:style style:name="T29" style:family="text">
      <style:text-properties fo:font-size="13pt" fo:font-weight="bold" officeooo:rsid="00146a61" style:font-size-asian="13pt" style:font-size-complex="13pt"/>
    </style:style>
    <style:style style:name="T30" style:family="text">
      <style:text-properties fo:font-size="13pt" fo:font-weight="bold" officeooo:rsid="001af3e5" style:font-size-asian="13pt" style:font-size-complex="13pt"/>
    </style:style>
    <style:style style:name="T31" style:family="text">
      <style:text-properties fo:font-weight="bold" officeooo:rsid="001f2c9e"/>
    </style:style>
    <style:style style:name="T32" style:family="text">
      <style:text-properties officeooo:rsid="001f2c9e"/>
    </style:style>
    <style:style style:name="T33" style:family="text">
      <style:text-properties officeooo:rsid="001fee2d"/>
    </style:style>
    <style:style style:name="T34" style:family="text">
      <style:text-properties style:font-name="Times New Roman" fo:font-size="13pt" fo:font-weight="bold" style:font-size-asian="13pt" style:font-size-complex="13pt"/>
    </style:style>
    <style:style style:name="T35" style:family="text">
      <style:text-properties fo:font-size="13pt" officeooo:rsid="00146a61" style:font-size-asian="13pt" style:font-size-complex="13pt"/>
    </style:style>
    <style:style style:name="T36" style:family="text">
      <style:text-properties fo:font-size="13pt" officeooo:rsid="001fee2d" style:font-size-asian="13pt" style:font-size-complex="13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2pt" officeooo:rsid="00146a61" style:font-size-asian="13pt" style:font-size-complex="13pt" loext:padding="0cm" loext:border="none"/>
    </style:style>
    <style:style style:name="T39" style:family="text">
      <style:text-properties fo:font-weight="normal" officeooo:rsid="001fee2d" style:font-weight-asian="normal" style:font-weight-complex="normal"/>
    </style:style>
    <style:style style:name="T40" style:family="text">
      <style:text-properties officeooo:rsid="00216dbb"/>
    </style:style>
    <style:style style:name="T41" style:family="text">
      <style:text-properties fo:font-variant="normal" fo:text-transform="none" fo:font-size="12pt" fo:letter-spacing="normal" fo:font-style="normal" loext:padding="0cm" loext:border="none"/>
    </style:style>
    <style:style style:name="T42" style:family="text">
      <style:text-properties fo:font-size="13pt" fo:font-weight="bold" officeooo:rsid="00216dbb" style:font-size-asian="13pt" style:font-weight-asian="bold" style:font-size-complex="13pt" style:font-weight-complex="bold"/>
    </style:style>
    <style:style style:name="T43" style:family="text">
      <style:text-properties fo:font-size="13pt" fo:font-weight="normal" officeooo:rsid="00216dbb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45" style:family="text">
      <style:text-properties style:font-name="Times New Roman"/>
    </style:style>
    <style:style style:name="T46" style:family="text">
      <style:text-properties fo:font-style="italic" officeooo:rsid="00181f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 проекте:</text:span><text:span text:style-name="T2"> </text:span><text:span text:style-name="T3">VECORDIA — это </text:span><text:span text:style-name="T4">аркадный</text:span><text:span text:style-name="T3"> 3D-хоррор от первого лица с элементами rogue-like и микроменеджмента стресса, ориентированный на короткие реиграбельные сессии.</text:span> </text:p>
      <text:p text:style-name="P2"><text:span text:style-name="T5">Суть продукта:</text:span> <text:span text:style-name="T6">Игровой процесс построен вокруг параноидального стремления протагониста к перфекционизму в условиях строгого ограничения по времени. Игрок заперт во временной петле и должен выполнить 4 бытовых ритуала. Основа геймплея — постоянное балансирование между скоростью выполнения задач и аккуратностью. Ошибки в ритуалах повышают скрытую динамическую шкалу Тревоги, которая усложняет управление и искажает восприятие. Превышение лимита времени или уровня Тревоги приводит к поражению и перезапуску цикла.</text:span></text:p>
      <text:p text:style-name="P2"><text:span text:style-name="T5">Ключевая задача:</text:span> Игра закрывает потребность в <text:span text:style-name="T5">коротких</text:span><text:span text:style-name="T7"> и интенсивных</text:span><text:span text:style-name="T5"> сессиях с высокой эмоциональной </text:span><text:span text:style-name="T7">амплитудой</text:span>, где игровой опыт <text:span text:style-name="T8">делится на две фазы</text:span> </text:p>
      <text:list text:style-name="L1">
        <text:list-item>
          <text:p text:style-name="P3"><text:span text:style-name="T5">Перв</text:span><text:span text:style-name="T7">ая</text:span><text:span text:style-name="T5"> </text:span><text:span text:style-name="T7">фаза</text:span><text:span text:style-name="T5">:</text:span> Игра решает задачу получения острых ощущений. Игрок сталкивается с неизвестностью, пугающими визуальными искажениями и давлением времени. Он учится справляться с паникой.</text:p>
        </text:list-item>
        <text:list-item>
          <text:p text:style-name="P3"><text:span text:style-name="T7">Вторая фаза</text:span><text:span text:style-name="T5">:</text:span> Когда страх отступает, игра раскрывается <text:span text:style-name="T5">для спидран</text:span><text:span text:style-name="T9">ов</text:span>. Игрок начинает понимать тайминги, просчитывать идеальный порядок выполнения 4-х ритуалов, балансировать на грани критического уровня тревоги ради экономии секунд и соревноваться с собственной эффективностью.<text:span text:style-name="T10">(в статистику оутласт добавить)</text:span></text:p>
        </text:list-item>
      </text:list>
      <text:p text:style-name="P2"/>
      <text:p text:style-name="P4"/>
      <text:p text:style-name="P4">ФТ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" loext:marker-style-name="T11"><text:span text:style-name="T12">ID</text:span></text:p>
          </table:table-cell>
          <table:table-cell table:style-name="Таблица5.B1" office:value-type="string">
            <text:p text:style-name="P5" loext:marker-style-name="T11"><text:span text:style-name="T12">Функциональное требова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5" loext:marker-style-name="T11"><text:span text:style-name="T13">Ф</text:span><text:span text:style-name="T14">Т-01</text:span></text:p>
          </table:table-cell>
          <table:table-cell table:style-name="Таблица5.B2" office:value-type="string">
            <text:p text:style-name="P6"><text:span text:style-name="T15"><text:line-break/>Система должна обеспечивать перемещение героя в трёхмерном пространстве с использованием клавиш W (вперёд), S (назад), A (влево), D (вправо)</text:span><text:span text:style-name="Strong_20_Emphasis_20__28_WW_29_"><text:span text:style-name="T16"> </text:span></text:span><text:span text:style-name="T15"><text:s/></text:span></text:p>
          </table:table-cell>
        </table:table-row>
        <table:table-row table:style-name="Таблица5.1">
          <table:table-cell table:style-name="Таблица5.A2" office:value-type="string">
            <text:p text:style-name="P5" loext:marker-style-name="T11"><text:span text:style-name="T13">Ф</text:span><text:span text:style-name="T14">Т-02</text:span></text:p>
          </table:table-cell>
          <table:table-cell table:style-name="Таблица5.B2" office:value-type="string">
            <text:p text:style-name="P5" loext:marker-style-name="T11"><text:span text:style-name="T14">Система должна обеспечивать поворот камеры (обзор) при движении мыши</text:span></text:p>
          </table:table-cell>
        </table:table-row>
        <table:table-row table:style-name="Таблица5.1">
          <table:table-cell table:style-name="Таблица5.A2" office:value-type="string">
            <text:p text:style-name="P5" loext:marker-style-name="T11"><text:span text:style-name="T13">Ф</text:span><text:span text:style-name="T14">Т-03</text:span></text:p>
          </table:table-cell>
          <table:table-cell table:style-name="Таблица5.B2" office:value-type="string">
            <text:p text:style-name="P7"><text:span text:style-name="T17">Система должна обеспечивать взаимодействие с активными объектами (двери, предметы, зоны ритуалов) по нажатию клавиши </text:span><text:span text:style-name="Strong_20_Emphasis_20__28_WW_29_"><text:span text:style-name="T18">E</text:span></text:span><text:span text:style-name="T17">. При наведении на активный объект должна появляться контекстная подсказка.</text:span></text:p>
          </table:table-cell>
        </table:table-row>
        <table:table-row table:style-name="Таблица5.1">
          <table:table-cell table:style-name="Таблица5.A2" office:value-type="string">
            <text:p text:style-name="P5" loext:marker-style-name="T11"><text:span text:style-name="T13">Ф</text:span><text:span text:style-name="T14">Т-04</text:span></text:p>
          </table:table-cell>
          <table:table-cell table:style-name="Таблица5.B2" office:value-type="string">
            <text:p text:style-name="P7" loext:marker-style-name="T19"><text:span text:style-name="T17">Система должна запускать сценарий </text:span><text:span text:style-name="Strong_20_Emphasis_20__28_WW_29_"><text:span text:style-name="T20">ритуала</text:span></text:span><text:span text:style-name="T17"> (например, мытьё посуды, полив цветов) при взаимодействии с соответствующей зоной/объектом.</text:span></text:p>
          </table:table-cell>
        </table:table-row>
        <table:table-row table:style-name="Таблица5.1">
          <table:table-cell table:style-name="Таблица5.A2" office:value-type="string">
            <text:p text:style-name="P5" loext:marker-style-name="T21"><text:span text:style-name="T13">Ф</text:span><text:span text:style-name="T14">Т-05</text:span></text:p>
          </table:table-cell>
          <table:table-cell table:style-name="Таблица5.B2" office:value-type="string">
            <text:p text:style-name="P8">Система должна иметь минималистичный графический интерфейс (HUD), отображающий текущие задачи и индикаторы взаимодействия в понятном для пользователя виде. </text:p>
          </table:table-cell>
        </table:table-row>
        <text:soft-page-break/>
        <table:table-row table:style-name="Таблица5.7">
          <table:table-cell table:style-name="Таблица5.A2" office:value-type="string">
            <text:p text:style-name="P5" loext:marker-style-name="T11"><text:span text:style-name="T13">Ф</text:span><text:span text:style-name="T14">Т-06</text:span></text:p>
          </table:table-cell>
          <table:table-cell table:style-name="Таблица5.B2" office:value-type="string">
            <text:p text:style-name="P8">Система должна обеспечивать полную техническую возможность завершения игрового процесса и воспроизведения финальных титров/кат-сцены при выполнении всех условий игры. </text:p>
          </table:table-cell>
        </table:table-row>
        <table:table-row table:style-name="Таблица5.8">
          <table:table-cell table:style-name="Таблица5.A2" office:value-type="string">
            <text:p text:style-name="P9" loext:marker-style-name="T11"><text:span text:style-name="T22">Ф</text:span>Т-0<text:span text:style-name="T23">7</text:span></text:p>
          </table:table-cell>
          <table:table-cell table:style-name="Таблица5.B2" office:value-type="string">
            <text:p text:style-name="P8" loext:marker-style-name="T11">Система должна предоставлять возможность перезапуска игрового процесса после поражения, позволяя игроку циклически накапливать игровой опыт до n-го количества раз для самостоятельного освоения правил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1"><text:span text:style-name="T22">Ф</text:span>Т-0<text:span text:style-name="T23">8</text:span></text:p>
          </table:table-cell>
          <table:table-cell table:style-name="Таблица5.B2" office:value-type="string">
            <text:p text:style-name="P8">Система должна обеспечивать свободный визуальный обзор всей игровой локации для поиска необходимых для прохождения ритуалов элементов. </text:p>
          </table:table-cell>
        </table:table-row>
        <table:table-row table:style-name="Таблица5.1">
          <table:table-cell table:style-name="Таблица5.A2" office:value-type="string">
            <text:p text:style-name="P9" loext:marker-style-name="T11"><text:span text:style-name="T22">Ф</text:span>Т-<text:span text:style-name="T23">09</text:span></text:p>
          </table:table-cell>
          <table:table-cell table:style-name="Таблица5.B2" office:value-type="string">
            <text:p text:style-name="P8" loext:marker-style-name="T11">Система должна обладать повышенным уровнем сложности и жесткими таймингами/условиями на начальных этапах игры, <text:span text:style-name="T24">минимезирующие </text:span><text:s/>успешное прохождение с первой попытки. </text:p>
          </table:table-cell>
        </table:table-row>
        <table:table-row table:style-name="Таблица5.1">
          <table:table-cell table:style-name="Таблица5.A2" office:value-type="string">
            <text:p text:style-name="P10" loext:marker-style-name="T11"><text:span text:style-name="T22">Ф</text:span>Т-<text:span text:style-name="T23">10</text:span></text:p>
          </table:table-cell>
          <table:table-cell table:style-name="Таблица5.B2" office:value-type="string">
            <text:p text:style-name="P5" loext:marker-style-name="T11">Система должна поддерживать нелинейную логику прохождения, отслеживая суммарный прогресс выполнения всех доступных ритуалов в любом порядке, и открывать путь к концовк<text:span text:style-name="T24">е</text:span> после завершения полного цикла задач. </text:p>
          </table:table-cell>
        </table:table-row>
      </table:table>
      <text:p text:style-name="P11"/>
      <text:p text:style-name="P11"/>
      <text:p text:style-name="P12">User Story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 loext:marker-style-name="T25">ID</text:p>
          </table:table-cell>
          <table:table-cell table:style-name="Таблица2.B1" office:value-type="string">
            <text:p text:style-name="P5" loext:marker-style-name="T11"><text:span text:style-name="T12"><text:s/>User Story</text:span></text:p>
          </table:table-cell>
        </table:table-row>
        <table:table-row table:style-name="Таблица2.2">
          <table:table-cell table:style-name="Таблица2.A2" office:value-type="string">
            <text:p text:style-name="P14" loext:marker-style-name="T11">ЮТ-01</text:p>
          </table:table-cell>
          <table:table-cell table:style-name="Таблица2.B2" office:value-type="string">
            <text:p text:style-name="P9" loext:marker-style-name="T11">Игрок должен иметь возможность перемещать персонажа вперёд/назад/влево/вправо с помощью WASD, чтобы исследовать локацию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02</text:p>
          </table:table-cell>
          <table:table-cell table:style-name="Таблица2.B2" office:value-type="string">
            <text:p text:style-name="P9" loext:marker-style-name="T11">Игрок должен иметь возможность взаимодействовать с предметами с помощью клавиши E, чтобы , взаимодействовать с предметами и начинать ритуал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03</text:p>
          </table:table-cell>
          <table:table-cell table:style-name="Таблица2.B2" office:value-type="string">
            <text:p text:style-name="P9" loext:marker-style-name="T11">Игрок должен иметь возможность слышать звуки окружения, чтобы вживаться в атмосферу игры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04</text:p>
          </table:table-cell>
          <table:table-cell table:style-name="Таблица2.B2" office:value-type="string">
            <text:p text:style-name="P9" loext:marker-style-name="T11">Игрок должен иметь возможность поставить игру на паузу, чтобы перевести дух и выйти в главное меню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05</text:p>
          </table:table-cell>
          <table:table-cell table:style-name="Таблица2.B2" office:value-type="string">
            <text:p text:style-name="P9" loext:marker-style-name="T11">Игрок должен иметь интуитивно понятный интерфейс, чтобы эффективно им пользоваться </text:p>
          </table:table-cell>
        </table:table-row>
        <table:table-row table:style-name="Таблица2.7">
          <table:table-cell table:style-name="Таблица2.A2" office:value-type="string">
            <text:p text:style-name="P14" loext:marker-style-name="T11">ЮТ-06</text:p>
          </table:table-cell>
          <table:table-cell table:style-name="Таблица2.B2" office:value-type="string">
            <text:p text:style-name="P9" loext:marker-style-name="T11">Игрок должен иметь возможность пройти игру, чтобы увидеть концовку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07</text:p>
          </table:table-cell>
          <table:table-cell table:style-name="Таблица2.B2" office:value-type="string">
            <text:p text:style-name="P9" loext:marker-style-name="T11">Игрок должен иметь возможность управлять мышкой, чтобы менять положение камеры </text:p>
          </table:table-cell>
        </table:table-row>
        <text:soft-page-break/>
        <table:table-row table:style-name="Таблица2.9">
          <table:table-cell table:style-name="Таблица2.A2" office:value-type="string">
            <text:p text:style-name="P14" loext:marker-style-name="T11">ЮТ-08</text:p>
          </table:table-cell>
          <table:table-cell table:style-name="Таблица2.B2" office:value-type="string">
            <text:p text:style-name="P9" loext:marker-style-name="T11">Игрок должен проиграть n-раз чтобы понять правила ритуалов </text:p>
          </table:table-cell>
        </table:table-row>
        <table:table-row table:style-name="Таблица2.10">
          <table:table-cell table:style-name="Таблица2.A2" office:value-type="string">
            <text:p text:style-name="P14" loext:marker-style-name="T11">ЮТ-09</text:p>
          </table:table-cell>
          <table:table-cell table:style-name="Таблица2.B2" office:value-type="string">
            <text:p text:style-name="P9" loext:marker-style-name="T11">Игрок должен иметь возможность осмотреть локацию чтобы пройти все ритуалы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10</text:p>
          </table:table-cell>
          <table:table-cell table:style-name="Таблица2.B2" office:value-type="string">
            <text:p text:style-name="P9" loext:marker-style-name="T11">Игрок должен испытывать трудности во время первых попыток, чтобы не пройти игру с первой попытки </text:p>
          </table:table-cell>
        </table:table-row>
        <table:table-row table:style-name="Таблица2.1">
          <table:table-cell table:style-name="Таблица2.A2" office:value-type="string">
            <text:p text:style-name="P14" loext:marker-style-name="T11">ЮТ-11</text:p>
          </table:table-cell>
          <table:table-cell table:style-name="Таблица2.B2" office:value-type="string">
            <text:p text:style-name="P15">Игрок должен иметь возможность выполнять ритуалы, чтобы дойти до концовки </text:p>
          </table:table-cell>
        </table:table-row>
      </table:table>
      <text:p text:style-name="P12"/>
      <text:p text:style-name="P11"/>
      <text:p text:style-name="P11"/>
      <text:p text:style-name="P11">НФТ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ID</text:p>
          </table:table-cell>
          <table:table-cell table:style-name="Таблица1.B1" office:value-type="string">
            <text:p text:style-name="P17">Нефункциональные требования </text:p>
          </table:table-cell>
        </table:table-row>
        <table:table-row table:style-name="Таблица1.1">
          <table:table-cell table:style-name="Таблица1.A2" office:value-type="string">
            <text:p text:style-name="P18">НФТ-01</text:p>
          </table:table-cell>
          <table:table-cell table:style-name="Таблица1.B2" office:value-type="string">
            <text:p text:style-name="P19">Частота кадров (FPS) в процессе исследования локации и проведения ритуалов не должна падать ниже 60 FPS на целевых системных требованиях при разрешении Full HD (1920x1080) </text:p>
          </table:table-cell>
        </table:table-row>
        <table:table-row table:style-name="Таблица1.1">
          <table:table-cell table:style-name="Таблица1.A2" office:value-type="string">
            <text:p text:style-name="P18">НФТ-02</text:p>
          </table:table-cell>
          <table:table-cell table:style-name="Таблица1.B2" office:value-type="string">
            <text:p text:style-name="P19">Время отклика (input lag) при управлении камерой с помощью мыши и перемещении на WASD не должно превышать 16 мс. </text:p>
          </table:table-cell>
        </table:table-row>
        <table:table-row table:style-name="Таблица1.1">
          <table:table-cell table:style-name="Таблица1.A2" office:value-type="string">
            <text:p text:style-name="P18">НФТ-03</text:p>
          </table:table-cell>
          <table:table-cell table:style-name="Таблица1.B2" office:value-type="string">
            <text:p text:style-name="P20">Контекстная подсказка клавиши $E$ должна появляться на экране в течение 100 мс после наведения камеры на интерактивный ритуальный объект. </text:p>
          </table:table-cell>
        </table:table-row>
        <table:table-row table:style-name="Таблица1.1">
          <table:table-cell table:style-name="Таблица1.A2" office:value-type="string">
            <text:p text:style-name="P18">НФТ-04</text:p>
          </table:table-cell>
          <table:table-cell table:style-name="Таблица1.B2" office:value-type="string">
            <text:p text:style-name="P19">Элементы интуитивно понятного интерфейса (шрифты задач, прицел, индикаторы прогресса ритуалов) должны оставаться читаемыми при любом уровне хоррор-освещения (в полной темноте, при свете свечи или мигающих лампах). </text:p>
          </table:table-cell>
        </table:table-row>
        <table:table-row table:style-name="Таблица1.1">
          <table:table-cell table:style-name="Таблица1.A2" office:value-type="string">
            <text:p text:style-name="P18">НФТ-05</text:p>
          </table:table-cell>
          <table:table-cell table:style-name="Таблица1.B2" office:value-type="string">
            <text:p text:style-name="P19">Меню паузы должно мгновенно (без анимационных задержек) останавливать все игровые таймеры, физику и логику ритуалов при нажатии <text:span text:style-name="T26">Esc</text:span>. </text:p>
          </table:table-cell>
        </table:table-row>
        <table:table-row table:style-name="Таблица1.1">
          <table:table-cell table:style-name="Таблица1.A2" office:value-type="string">
            <text:p text:style-name="P18">НФТ-06</text:p>
          </table:table-cell>
          <table:table-cell table:style-name="Таблица1.B2" office:value-type="string">
            <text:p text:style-name="P19">При нелинейном выполнении ритуалов в случайном порядке система не должна вызывать конфликтов в логике игры или приводить к «софтлокам» (ситуациям, когда игру невозможно пройти дальше). </text:p>
          </table:table-cell>
        </table:table-row>
        <table:table-row table:style-name="Таблица1.1">
          <table:table-cell table:style-name="Таблица1.A2" office:value-type="string">
            <text:p text:style-name="P18">НФТ-07</text:p>
          </table:table-cell>
          <table:table-cell table:style-name="Таблица1.B2" office:value-type="string">
            <text:p text:style-name="P19">Фоновый эмбиент должен воспроизводиться бесшовно, без заметных щелчков или пауз при зацикливании аудиодорожки. </text:p>
          </table:table-cell>
        </table:table-row>
        <table:table-row table:style-name="Таблица1.1">
          <table:table-cell table:style-name="Таблица1.A2" office:value-type="string">
            <text:p text:style-name="P18">НФТ-08</text:p>
          </table:table-cell>
          <table:table-cell table:style-name="Таблица1.B2" office:value-type="string">
            <text:p text:style-name="P20">Система должна бесшовно обнулять состояние локации и возвращать персонажа на исходную точку после каждого из n поражений, не заставляя игрока возвращаться в главное меню и повторно проходить экраны загрузки. </text:p>
          </table:table-cell>
        </table:table-row>
        <table:table-row table:style-name="Таблица1.1">
          <table:table-cell table:style-name="Таблица1.A2" office:value-type="string">
            <text:p text:style-name="P18">НФТ-09</text:p>
          </table:table-cell>
          <table:table-cell table:style-name="Таблица1.B2" office:value-type="string">
            <text:p text:style-name="P19">При получении игроком поражения система должна гарантированно сохранять накопительный опыт (<text:span text:style-name="T27">порезы на доске)</text:span>, изолируя эти данные от динамического сброса состояния интерактивных предметов на локации. </text:p>
          </table:table-cell>
        </table:table-row>
      </table:table>
      <text:p text:style-name="P11"/>
      <text:h text:style-name="P21" text:outline-level="3"><text:soft-page-break/>Задачи по <text:span text:style-name="T28">Moscow</text:span></text:h>
      <text:h text:style-name="P22" text:outline-level="3">1. Must Have (Обязательно должно быть)</text:h>
      <text:p text:style-name="P23"/>
      <text:list xml:id="list3822171874" text:style-name="L2">
        <text:list-item>
          <text:p text:style-name="P24"><text:span text:style-name="T5">Игровой цикл (Core Loop):</text:span> Возможность запустить игру, начать выполнение ритуалов, проиграть (умереть от тревоги) и выиграть (успеть всё сделать).</text:p>
        </text:list-item>
        <text:list-item>
          <text:p text:style-name="P24"><text:span text:style-name="T5">Архитектура ритуалов:</text:span> Реализация 4 конкретных ритуалов с возможностью проходить их в <text:span text:style-name="T5">любой</text:span> последовательности (нелинейность).</text:p>
        </text:list-item>
        <text:list-item>
          <text:p text:style-name="P24"><text:span text:style-name="T5">Система тревоги (Тайм-менеджмент):</text:span> Скрытая шкала тревоги, которая стабильно растет от времени и резко увеличивается при ошибках игрока в ритуалах. При достижении 100% — мгновенный проигрыш и рестарт.</text:p>
        </text:list-item>
        <text:list-item>
          <text:p text:style-name="P24"><text:span text:style-name="T5">Условие победы:</text:span> Проверка выполнения всех 4 ритуалов и вывод финальн<text:span text:style-name="T8">ый кат-сцены</text:span>.</text:p>
        </text:list-item>
        <text:list-item>
          <text:p text:style-name="P24"><text:span text:style-name="T5">Интерактивные объекты для ритуалов:</text:span> Все 3D-модели предметов, с которыми игрок непосредственно взаимодействует во время выполнения 4-х ритуалов</text:p>
        </text:list-item>
      </text:list>
      <text:list text:style-name="L3">
        <text:list-item>
          <text:p text:style-name="P25"><text:span text:style-name="T5">Окружение локации:</text:span> Готовые 3D-модели мебели и предметов интерьера для создания замкнутого пространства (квартиры/комнат). Локация должна быть полностью собрана.</text:p>
        </text:list-item>
      </text:list>
      <text:list text:style-name="L4">
        <text:list-item>
          <text:p text:style-name="P26"><text:span text:style-name="T5">Анимации взаимодействия:</text:span> Базовые анимации (или визуальные состояния) для 3D-моделей, показывающие, что ритуал продвигается, завершен или завален.</text:p>
        </text:list-item>
      </text:list>
      <text:list text:continue-list="list3822171874" text:style-name="L2">
        <text:list-item>
          <text:p text:style-name="P27"><text:span text:style-name="T5">Визуальные и аудио-искажения (Глюки):</text:span> Постепенное размытие экрана, появление шумов, шепота и дрожания камеры.</text:p>
        </text:list-item>
      </text:list>
      <text:h text:style-name="P28" text:outline-level="3">2. Should Have (Должно быть, но не критично для первой сборки)</text:h>
      <text:list text:style-name="L5">
        <text:list-item>
          <text:p text:style-name="P29"><text:span text:style-name="T5">Динамическая сложность:</text:span> Усложнение механики ритуалов при высоком уровне тревоги.</text:p>
        </text:list-item>
        <text:list-item>
          <text:p text:style-name="P29"><text:span text:style-name="T5">Базовые скримеры:</text:span> Спавн пугающих триггеров (резкие тени, звуки), частота которых напрямую привязана к высокому уровню тревоги.</text:p>
        </text:list-item>
      </text:list>
      <text:h text:style-name="P28" text:outline-level="3">3. Could Have (Могло бы быть, если останется время)</text:h>
      <text:p text:style-name="P2"><text:span text:style-name="T26"/></text:p>
      <text:list text:style-name="L6">
        <text:list-item>
          <text:p text:style-name="P30"><text:span text:style-name="T5">Вариативность скримеров:</text:span> Разнообразие пугающих эффектов, чтобы они не приедались за первые 3–4 сессии.</text:p>
        </text:list-item>
        <text:list-item>
          <text:p text:style-name="P31"><text:span text:style-name="T29">У</text:span><text:span text:style-name="T30">сложненная</text:span><text:span text:style-name="T29"> графика и свет</text:span><text:span text:style-name="T5">:</text:span> Реалистичные отражения в стеклах, зеркалах, глянцевых поверхностях и детальные шейдеры преломления света. </text:p>
        </text:list-item>
        <text:list-item>
          <text:p text:style-name="P30"><text:soft-page-break/><text:span text:style-name="T5">Проработка «внешнего мира» за окном:</text:span> Всё, что находится за пределами игровой комнаты/квартиры (вид из окна, проезжающие машины, задний план), блокируется глухими шторами, темнотой или простым непрозрачным текстурным фоном.</text:p>
        </text:list-item>
        <text:list-item>
          <text:p text:style-name="P30"><text:span text:style-name="T31">Голосовое сопровождение</text:span><text:span text:style-name="T5">:</text:span> <text:span text:style-name="T32">Добавление озвученных реплик для усиления общей атмосферы игры. </text:span></text:p>
        </text:list-item>
      </text:list>
      <text:p text:style-name="P32"><text:span text:style-name="T32">Критери</text:span><text:span text:style-name="T33">и</text:span><text:span text:style-name="T32"> </text:span>приемки</text:p>
      <text:h text:style-name="P22" text:outline-level="3"><text:s/>1: Техническая приемка (Проверка кода и сборки)</text:h>
      <text:list text:style-name="L7">
        <text:list-item>
          <text:p text:style-name="P33"><text:span text:style-name="T34">Игра собирается (Билдится):</text:span><text:span text:style-name="T15"> Проект успешно экспортируется из Unity <text:s/>в рабочий </text:span><text:span text:style-name="Source_20_Text"><text:span text:style-name="T15">.exe</text:span></text:span><text:span text:style-name="T15"> файл без ошибок в консоли.</text:span></text:p>
        </text:list-item>
        <text:list-item>
          <text:p text:style-name="P34"><text:span text:style-name="T31">Возможность пройти игру</text:span><text:span text:style-name="T5">:</text:span> Тестировщик может запустить билд, зайти в комнату, выполнить все 4 ритуала в <text:span text:style-name="T26">любой</text:span> последовательности и <text:span text:style-name="T32">в случае успешного прохождения ритуалов увидеть кат-сцену</text:span>.</text:p>
        </text:list-item>
        <text:list-item>
          <text:p text:style-name="P35"><text:span text:style-name="T29">Смерть работает:</text:span><text:span text:style-name="T35"> </text:span><text:span text:style-name="T36">П</text:span>ревышение лимита времени или уровня тревоги <text:span text:style-name="T37">приводит к поражению</text:span> и перезапуску цикла <text:span text:style-name="T38">.</text:span></text:p>
        </text:list-item>
        <text:list-item>
          <text:p text:style-name="P34"><text:span text:style-name="T5">Механика паузы: </text:span><text:span text:style-name="T39">Игру возможно поставить на паузу не теряя игровой прогресс.</text:span></text:p>
        </text:list-item>
        <text:list-item>
          <text:p text:style-name="P34"><text:span text:style-name="T5">Отсутствие «софтлоков»:</text:span> Нет багов, которые <text:span text:style-name="T33">критично</text:span> ломают прохождение (например, когда предмет для ритуала провалился сквозь текстуры или кнопка взаимодействия перестала нажиматься).</text:p>
        </text:list-item>
      </text:list>
      <text:h text:style-name="P28" text:outline-level="3">2: Арт и Аудио приемка (Проверка контента)</text:h>
      <text:list xml:id="list516239808" text:style-name="L8">
        <text:list-item>
          <text:p text:style-name="P36"><text:span text:style-name="T5">Все плейсхолдеры удалены:</text:span> В игре нет «серых кубов» или стандартных ассетов Unity. Все 3D-модели комнат и ритуальных предметов стоят на своих местах.</text:p>
        </text:list-item>
        <text:list-item>
          <text:p text:style-name="P36"><text:span text:style-name="T5">Визуальный фидбек тревоги:</text:span> При приближении тревоги к критической отметке на экране появляются запланированные искажения (глюки/звуки), по которым можно понять уровень <text:span text:style-name="T40">тревоги</text:span> без цифр.</text:p>
        </text:list-item>
        <text:list-item>
          <text:p text:style-name="P37"><text:span text:style-name="T5">Коллизии настроены:</text:span> Игрок не может ходить сквозь стены, просовывать голову в закрытые шкафы или выпадать за пределы карты.</text:p>
        </text:list-item>
      </text:list>
      <text:p text:style-name="P38">3: <text:span text:style-name="T41">Геймдизайн и Баланс (Игровой опыт)</text:span></text:p>
      <text:list text:style-name="L9">
        <text:list-item>
          <text:p text:style-name="P39"><text:span text:style-name="T42">Математическая модель таймера сбалансирована: </text:span><text:span text:style-name="T43">Т</text:span><text:span text:style-name="T44">естировщик</text:span><text:span text:style-name="T3"> может пройти игру от начала до конца за 4 минуты при безошибочном выполнении всех ритуалов.</text:span> <text:span text:style-name="T3">Намеренное совершение критических ошибок (например, перелив цветка или неверные цвета в шкафу) гарантированно доводит Тревогу до 100% и убивает персонажа до истечения времени.</text:span> </text:p>
        </text:list-item>
      </text:list>
      <text:p text:style-name="P40"/>
      <text:h text:style-name="P41" text:outline-level="2"><text:soft-page-break/>Общий DoD для всего MVP </text:h>
      <text:list text:style-name="L10">
        <text:list-item>
          <text:p text:style-name="P42"><text:span text:style-name="T5">Полная интеграция:</text:span> Все модели, звуки, тексты и скрипты объединены в проекте Unity. Плейсхолдеров (заглушек) не осталось.</text:p>
        </text:list-item>
        <text:list-item>
          <text:p text:style-name="P42"><text:span text:style-name="T5">Успешный билд:</text:span> Игра успешно собирается в автономный <text:span text:style-name="Source_20_Text"><text:span text:style-name="T45">.exe</text:span></text:span> файл. Билд запускается на ПК без установленного Unity.</text:p>
        </text:list-item>
        <text:list-item>
          <text:p text:style-name="P42"><text:span text:style-name="T5">Прохождение критического пути:</text:span> Игру можно запустить, пройти все 4 ритуала, умереть от тревоги, победить и увидеть финальный экран. Все сценарии работают.</text:p>
        </text:list-item>
        <text:list-item>
          <text:p text:style-name="P42"><text:span text:style-name="T5">Отсутствие критических багов:</text:span> В игре нет багов, из-за которых игрок застревает в текстурах, не может нажать кнопку или полностью теряет возможность пройти уровень.</text:p>
        </text:list-item>
        <text:list-item>
          <text:p text:style-name="P42"><text:span text:style-name="T5">Финальное демо:</text:span> Все 4 участника команды запустили готовый <text:span text:style-name="Source_20_Text"><text:span text:style-name="T45">.exe</text:span></text:span>, поиграли и единогласно сказали: <text:span text:style-name="T26">«</text:span><text:span text:style-name="T46">Все работает как надо</text:span><text:span text:style-name="T26">»</text:span>.</text:p>
        </text:list-item>
      </text:list>
      <text:p text:style-name="P43"/>
      <text:list text:continue-list="list516239808" text:style-name="L8">
        <text:list-header>
          <text:p text:style-name="P36"/>
        </text:list-header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18:12:21.718000500</meta:creation-date>
    <dc:date>2026-06-19T20:20:14.178546700</dc:date>
    <meta:editing-duration>PT46M9S</meta:editing-duration>
    <meta:editing-cycles>6</meta:editing-cycles>
    <meta:generator>LibreOffice/26.2.0.3$Windows_X86_64 LibreOffice_project/620$Build-3</meta:generator>
    <meta:document-statistic meta:table-count="3" meta:image-count="0" meta:object-count="0" meta:page-count="6" meta:paragraph-count="112" meta:word-count="1325" meta:character-count="9917" meta:non-whitespace-character-count="8692"/>
  </office:meta>
</office:document-meta>
</file>