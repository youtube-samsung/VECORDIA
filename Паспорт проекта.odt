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683cm" fo:margin-left="-0.651cm" fo:margin-top="0cm" fo:margin-bottom="0cm" table:align="left" style:writing-mode="page"/>
    </style:style>
    <style:style style:name="Таблица1.A" style:family="table-column">
      <style:table-column-properties style:column-width="1.94cm"/>
    </style:style>
    <style:style style:name="Таблица1.B" style:family="table-column">
      <style:table-column-properties style:column-width="6.5cm"/>
    </style:style>
    <style:style style:name="Таблица1.C" style:family="table-column">
      <style:table-column-properties style:column-width="9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/>
    </style:style>
    <style:style style:name="Таблица1.8" style:family="table-row">
      <style:table-row-properties style:min-row-height="0.691cm" fo:keep-together="auto"/>
    </style:style>
    <style:style style:name="Таблица1.24" style:family="table-row">
      <style:table-row-properties style:min-row-height="1.021cm" fo:keep-together="auto"/>
    </style:style>
    <style:style style:name="Таблица2" style:family="table">
      <style:table-properties style:width="17cm" fo:margin-left="0cm" fo:margin-top="0cm" fo:margin-bottom="0cm" table:align="left" style:writing-mode="page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18cm" fo:padding-right="0.018cm" fo:padding-top="0cm" fo:padding-bottom="0cm" fo:border="none"/>
    </style:style>
    <style:style style:name="Таблица2.2" style:family="table-row">
      <style:table-row-properties style:min-row-height="0.404cm" fo:keep-together="auto"/>
    </style:style>
    <style:style style:name="Таблица2.4" style:family="table-row">
      <style:table-row-properties style:min-row-height="0.545cm" fo:keep-together="auto"/>
    </style:style>
    <style:style style:name="Таблица4" style:family="table">
      <style:table-properties style:width="17.769cm" fo:margin-left="-0.106cm" fo:margin-top="0cm" fo:margin-bottom="0cm" table:align="left" style:writing-mode="page"/>
    </style:style>
    <style:style style:name="Таблица4.A" style:family="table-column">
      <style:table-column-properties style:column-width="0.808cm"/>
    </style:style>
    <style:style style:name="Таблица4.B" style:family="table-column">
      <style:table-column-properties style:column-width="3.369cm"/>
    </style:style>
    <style:style style:name="Таблица4.C" style:family="table-column">
      <style:table-column-properties style:column-width="2.591cm"/>
    </style:style>
    <style:style style:name="Таблица4.D" style:family="table-column">
      <style:table-column-properties style:column-width="1.864cm"/>
    </style:style>
    <style:style style:name="Таблица4.E" style:family="table-column">
      <style:table-column-properties style:column-width="2.311cm"/>
    </style:style>
    <style:style style:name="Таблица4.F" style:family="table-column">
      <style:table-column-properties style:column-width="3.344cm"/>
    </style:style>
    <style:style style:name="Таблица4.G" style:family="table-column">
      <style:table-column-properties style:column-width="3.48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49cm" fo:border="none"/>
    </style:style>
    <style:style style:name="Таблица4.6" style:family="table-row">
      <style:table-row-properties style:min-row-height="0.506cm" fo:keep-together="auto"/>
    </style:style>
    <style:style style:name="P1" style:family="paragraph" style:parent-style-name="Heading_20_2">
      <style:paragraph-properties fo:margin-top="0cm" fo:margin-bottom="0.423cm" style:contextual-spacing="false" fo:text-align="left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_20__28_WW_29_">
      <style:paragraph-properties fo:text-align="lef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Text_20_body_20__28_WW_29_" style:list-style-name="WWNum5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_20__28_WW_29_">
      <style:paragraph-properties fo:text-align="left" style:justify-single-word="false"/>
      <style:text-properties fo:font-variant="normal" fo:text-transform="none" style:font-name="Times New Roman" fo:font-size="12pt" fo:letter-spacing="normal" fo:font-style="normal" fo:font-weight="normal" officeooo:paragraph-rsid="0023953a" style:font-size-asian="12pt" style:font-size-complex="12pt"/>
    </style:style>
    <style:style style:name="P7" style:family="paragraph" style:parent-style-name="Heading_20_3">
      <style:paragraph-properties fo:text-align="left" style:justify-single-word="false"/>
      <style:text-properties style:font-name="Times New Roman" fo:font-size="12pt" style:font-name-asian="Songti SC" style:font-size-asian="12pt" style:font-name-complex="Arial Unicode MS" style:font-size-complex="12pt"/>
    </style:style>
    <style:style style:name="P8" style:family="paragraph" style:parent-style-name="Text_20_body_20__28_WW_29_" style:list-style-name="WWNum9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_20__28_WW_29_" style:list-style-name="WWNum8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_20__28_WW_29_" style:list-style-name="WWNum11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_20__28_WW_29_">
      <style:paragraph-properties fo:text-align="left" style:justify-single-word="false"/>
    </style:style>
    <style:style style:name="P12" style:family="paragraph" style:parent-style-name="Text_20_body" style:list-style-name="L1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list-style-name="L1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3">
      <style:paragraph-properties fo:margin-top="0cm" fo:margin-bottom="0.247cm" style:contextual-spacing="false" fo:line-height="115%" fo:text-align="left" style:justify-single-word="false"/>
      <style:text-properties fo:color="#222222" loext:opacity="100%" style:font-name="Times New Roman" fo:font-size="12pt" style:font-size-asian="12pt" style:font-size-complex="12pt"/>
    </style:style>
    <style:style style:name="P15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officeooo:paragraph-rsid="00209189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font-variant="normal" fo:text-transform="none" fo:color="#222222" loext:opacity="100%" style:font-name="Times New Roman" fo:font-size="12pt" fo:letter-spacing="normal" fo:font-style="normal" fo:font-weight="bold" officeooo:paragraph-rsid="00209189" style:font-size-asian="12pt" style:font-weight-asian="bold" style:font-size-complex="12pt" style:font-weight-complex="bold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list-style-name="L3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list-style-name="L3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265f86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Заголовок_20_таблицы">
      <style:paragraph-properties fo:text-align="left" style:justify-single-word="false"/>
    </style:style>
    <style:style style:name="P22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9a186" officeooo:paragraph-rsid="0009a186" style:font-size-asian="12pt" style:font-size-complex="12pt"/>
    </style:style>
    <style:style style:name="P23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b6d35" officeooo:paragraph-rsid="000b6d35" style:font-size-asian="12pt" style:font-weight-asian="bold" style:font-size-complex="12pt" style:font-weight-complex="bold"/>
    </style:style>
    <style:style style:name="P24" style:family="paragraph" style:parent-style-name="Содержимое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21b452" officeooo:paragraph-rsid="0021b452" style:font-size-asian="12pt" style:font-size-complex="12pt"/>
    </style:style>
    <style:style style:name="P26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9a186" officeooo:paragraph-rsid="0009a186" style:font-size-asian="12pt" style:font-weight-asian="bold" style:font-size-complex="12pt" style:font-weight-complex="bold"/>
    </style:style>
    <style:style style:name="P27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b6d35" officeooo:paragraph-rsid="000b6d35" style:font-size-asian="12pt" style:font-size-complex="12pt"/>
    </style:style>
    <style:style style:name="P29" style:family="paragraph" style:parent-style-name="Table_20_Contents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Table_20_Contents">
      <style:paragraph-properties fo:text-align="left" style:justify-single-word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Text_20_body_20__28_WW_29_" style:list-style-name="WWNum12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32" style:family="paragraph" style:parent-style-name="Text_20_body_20__28_WW_29_" style:list-style-name="WWNum12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_20__28_WW_29_" style:list-style-name="WWNum1a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34" style:family="paragraph" style:parent-style-name="Text_20_body_20__28_WW_29_" style:list-style-name="WWNum1a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Text_20_body_20__28_WW_29_" style:list-style-name="WWNum1a">
      <style:paragraph-properties fo:text-align="left" style:justify-single-word="false">
        <style:tab-stops>
          <style:tab-stop style:position="2.501cm"/>
        </style:tab-stops>
      </style:paragraph-properties>
    </style:style>
    <style:style style:name="P36" style:family="paragraph" style:parent-style-name="Text_20_body_20__28_WW_29_">
      <style:paragraph-properties fo:margin-left="0.751cm" fo:text-align="left" style:justify-single-word="false">
        <style:tab-stops>
          <style:tab-stop style:position="2.002cm"/>
        </style:tab-stops>
      </style:paragraph-properties>
      <style:text-properties style:font-name="Times New Roman" fo:font-size="12pt" style:font-size-asian="12pt" style:font-size-complex="12pt"/>
    </style:style>
    <style:style style:name="P37" style:family="paragraph" style:parent-style-name="Заголовок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Содержимое_20_таблицы">
      <style:paragraph-properties fo:text-align="left" style:justify-single-word="false"/>
      <style:text-properties style:font-name="Times New Roman" fo:font-size="12pt" fo:language="en" fo:country="US" style:font-size-asian="12pt" style:font-size-complex="12pt"/>
    </style:style>
    <style:style style:name="P39" style:family="paragraph" style:parent-style-name="Standard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officeooo:rsid="0019a77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language="ru" fo:country="RU" fo:font-style="normal" fo:font-weight="normal" officeooo:rsid="0019a772"/>
    </style:style>
    <style:style style:name="T5" style:family="text">
      <style:text-properties fo:font-variant="normal" fo:text-transform="none" fo:letter-spacing="normal" fo:font-style="normal" fo:font-weight="normal" officeooo:rsid="00220f18"/>
    </style:style>
    <style:style style:name="T6" style:family="text">
      <style:text-properties loext:padding="0cm" loext:border="none"/>
    </style:style>
    <style:style style:name="T7" style:family="text">
      <style:text-properties officeooo:rsid="0019d073" loext:padding="0cm" loext:border="none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9d073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222222" loext:opacity="100%" style:font-name="Times New Roman"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222222" loext:opacity="100%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222222" loext:opacity="100%" style:font-name="Times New Roman" fo:font-size="12pt" fo:letter-spacing="normal" fo:font-style="normal" fo:font-weight="bold" officeooo:rsid="00255b5a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209189"/>
    </style:style>
    <style:style style:name="T16" style:family="text">
      <style:text-properties fo:language="ru" fo:country="RU" officeooo:rsid="00265f86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officeooo:rsid="00209189"/>
    </style:style>
    <style:style style:name="T19" style:family="text">
      <style:text-properties officeooo:rsid="00255b5a"/>
    </style:style>
    <style:style style:name="T20" style:family="text">
      <style:text-properties officeooo:rsid="00265f86"/>
    </style:style>
    <style:style style:name="T21" style:family="text">
      <style:text-properties fo:color="#222222" loext:opacity="100%" style:font-name="Times New Roman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officeooo:rsid="0021b452"/>
    </style:style>
    <style:style style:name="T24" style:family="text">
      <style:text-properties fo:language="en" fo:country="US"/>
    </style:style>
    <style:style style:name="T25" style:family="text">
      <style:text-properties fo:color="#222222" loext:opacity="100%" style:font-name="Times New Roman" fo:font-size="12pt" style:font-size-asian="12pt" style:font-size-complex="12pt"/>
    </style:style>
    <style:style style:name="T26" style:family="text">
      <style:text-properties style:font-name="Times New Roman" fo:font-size="12pt" fo:language="en" fo:country="US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облема и актуальность:</text:h>
      <text:p text:style-name="P2"><text:span text:style-name="T1">Проблема: </text:span><text:span text:style-name="T2">Мы живем в эпоху «быстрого контента» и дефицита свободного времени. Стандартные медиаформаты длинные сериалы или масштабные игры</text:span><text:span text:style-name="T3"> </text:span><text:span text:style-name="T2">требуют от человека огромных ментальных ресурсов и долгого погружения, на которые часто нет сил </text:span><text:span text:style-name="T4">или времени</text:span><text:span text:style-name="T2">. При этом у аудитории сохраняется потребность в эмоциональной разрядке и переключении фокуса внимания после тяжелого дня. Возникает разрыв: крупные проекты </text:span><text:span text:style-name="T1">могут </text:span><text:span text:style-name="T2">утомлят</text:span><text:span text:style-name="T1">ь</text:span><text:span text:style-name="T2"> своей продолжительностью, а типичные короткие мобильные игры предлагают лишь механическое «убийство времени», не давая </text:span><text:span text:style-name="T5">достаточного</text:span><text:span text:style-name="T2"> эмоционального отклика.</text:span> </text:p>
      <text:p text:style-name="P3"><text:span text:style-name="T6">Актуальность проблемы подтверждается глобальным изменением паттернов восприятия информации. Эпоха алгоритмических лент (TikTok, Shorts, Reels) перестроила дофаминовую систему аудитории: современный пользователь привык получать эмоциональный отклик в первые же секунды взаимодействия с контентом. Классическая структура видеоигр — с долгой экспозицией, обучением и медленным погружением — сегодня вступает в конфликт с этой реальностью. Игрок с клиповым мышлением теряет фокус еще до того, как начнется основной геймплей. Проект VECORDIA актуален тем, </text:span><text:span text:style-name="T7">что</text:span><text:span text:style-name="T6"> напряжение и вызов здесь стартуют с первой секунды, удовлетворяя потребность современной аудитории в мгновенной вовлеченности. <text:s text:c="9"/></text:span></text:p>
      <text:p text:style-name="P2"/>
      <text:p text:style-name="P2"><text:s/></text:p>
      <text:p text:style-name="P4">Целевая аудитория</text:p>
      <text:p text:style-name="P2">Наша основная аудитория — это люди в возрасте от 18 до 35 лет. Это активные пользователи Steam и площадок вроде itch.io, которые следят за инди-сценой и предпочитают компактные авторские проекты масштабным блокбастерам. </text:p>
      <text:p text:style-name="P2">Мы выделяем две основные группы:</text:p>
      <text:list text:style-name="WWNum5">
        <text:list-item>
          <text:p text:style-name="P5"><text:span text:style-name="T8">Любители инди-игр и жанра хоррор:</text:span> Это игроки, которые ищут <text:span text:style-name="T9">новый игровой опыт с интересными </text:span>геймплейны<text:span text:style-name="T9">ми</text:span> фишк<text:span text:style-name="T9">ами</text:span>. Им важна атмосфера, визуальный стиль, <text:span text:style-name="T9">а также</text:span> <text:span text:style-name="T9">о</text:span>ни ценят короткие, но насыщенные истории, которые можно пройти за один присест.</text:p>
        </text:list-item>
        <text:list-item>
          <text:p text:style-name="P5"><text:span text:style-name="T10">Сообщество спидраннеров и любителей хардкорного геймплея:</text:span> Игроки, ориентированные на идеальное освоение игровых механик, оптимизацию маршрутов и соревнование со временем. Для этой группы игра раскрывается во «второй фазе»: когда страх отступает, их главным стимулом становится чистый азарт. Они возвращаются в проект ради поиска идеальных таймингов, эффективного микроменеджмента стресса и возможности балансировать на грани критического уровня тревоги ради экономии ценных секунд. </text:p>
        </text:list-item>
      </text:list>
      <text:p text:style-name="P2"/>
      <text:h text:style-name="P1" text:outline-level="2">Миссия</text:h>
      <text:p text:style-name="P2"><text:span text:style-name="T2">Доказать на практике, что для создания увлекательной игры и привлечения внимания аудитории не требуются огромная команда или раздутые бюджеты. Мы стремимся показать, </text:span><text:soft-page-break/><text:span text:style-name="T2">что грамотно выстроенный цикл базовых механик способен затягивать сам по себе, делая ставку на выверенный геймплей, а не на дорогостоящий контент.</text:span> </text:p>
      <text:p text:style-name="P2"/>
      <text:h text:style-name="P1" text:outline-level="2">Цель</text:h>
      <text:p text:style-name="P6">Цель проекта — к 25 июня 2026 года разработать и подготовить к защите играбельный MVP-билд аркадного хоррора, включающий готовую локацию, систему нарастания тревожности и полностью реализованные механики бытовых ритуалов. Фокусировка на ограниченном количестве механик гарантирует достижимость результата в срок и выступает практическим фундаментом для реализации нашей миссии.</text:p>
      <text:p text:style-name="P2"/>
      <text:h text:style-name="P7" text:outline-level="3">Задачи проекта</text:h>
      <text:p text:style-name="P4">1. Пре-продакшн</text:p>
      <text:list xml:id="list438375326" text:style-name="WWNum9">
        <text:list-item>
          <text:p text:style-name="P8">Создание концепции игры</text:p>
        </text:list-item>
        <text:list-item>
          <text:p text:style-name="P8">Создание мудборда/концепт-артов</text:p>
        </text:list-item>
        <text:list-item>
          <text:p text:style-name="P8">Написание сценария и реплик</text:p>
        </text:list-item>
        <text:list-item>
          <text:p text:style-name="P8">Проектирование локации</text:p>
        </text:list-item>
        <text:list-item>
          <text:p text:style-name="P8">Проектирование UI/UX</text:p>
        </text:list-item>
        <text:list-item>
          <text:p text:style-name="P8">Создание звуковой концепции</text:p>
        </text:list-item>
        <text:list-item>
          <text:p text:style-name="P8">Создание репозитория GitHub</text:p>
        </text:list-item>
      </text:list>
      <text:p text:style-name="P2"><text:span text:style-name="T8">2. </text:span><text:span text:style-name="T11">Производство контента и ассетов</text:span> </text:p>
      <text:list text:style-name="WWNum8">
        <text:list-item>
          <text:p text:style-name="P9">Создание 3д моделей окружения</text:p>
        </text:list-item>
        <text:list-item>
          <text:p text:style-name="P9">Доработка сценария</text:p>
        </text:list-item>
        <text:list-item>
          <text:p text:style-name="P9">Создание UI элементов</text:p>
        </text:list-item>
        <text:list-item>
          <text:p text:style-name="P9">Создание/подбор эмбиентов, проработка звуковых эффектов</text:p>
        </text:list-item>
      </text:list>
      <text:p text:style-name="P2"><text:span text:style-name="T8">3. </text:span><text:span text:style-name="T11">Программирование, интеграция и сборка </text:span></text:p>
      <text:list text:style-name="WWNum11">
        <text:list-item>
          <text:p text:style-name="P10">Настройка проекта в движке, импорт ассетов</text:p>
        </text:list-item>
        <text:list-item>
          <text:p text:style-name="P10">Грей-боксинг</text:p>
        </text:list-item>
        <text:list-item>
          <text:p text:style-name="P10">Реализация контроллера персонажа (ходьба, бег, мышь)</text:p>
        </text:list-item>
        <text:list-item>
          <text:p text:style-name="P10">Реализация систем ритуалов</text:p>
        </text:list-item>
        <text:list-item>
          <text:p text:style-name="P10">Создание инструментов (аудиоменеджер, менеджер субтитров)</text:p>
        </text:list-item>
      </text:list>
      <text:p text:style-name="P4">4. Тестирование и доработка</text:p>
      <text:list text:continue-list="list438375326" text:style-name="WWNum9">
        <text:list-item>
          <text:p text:style-name="P8">Функциональное тестирование</text:p>
        </text:list-item>
        <text:list-item>
          <text:p text:style-name="P8">Игровой тест</text:p>
        </text:list-item>
        <text:list-item>
          <text:p text:style-name="P8"><text:soft-page-break/>Исправление багов</text:p>
        </text:list-item>
        <text:list-item>
          <text:p text:style-name="P8">Финальная полировка</text:p>
        </text:list-item>
      </text:list>
      <text:p text:style-name="P4">5. Релиз</text:p>
      <text:list text:continue-numbering="true" text:style-name="WWNum9">
        <text:list-item>
          <text:p text:style-name="P8">Финальная сборка</text:p>
        </text:list-item>
        <text:list-item>
          <text:p text:style-name="P8">Финальное тестирование билда</text:p>
        </text:list-item>
        <text:list-item>
          <text:p text:style-name="P8">Подготовка презентации (скриншоты, слайды, гифки)</text:p>
        </text:list-item>
        <text:list-item>
          <text:p text:style-name="P8">Защита проекта</text:p>
        </text:list-item>
      </text:list>
      <text:p text:style-name="P2"/>
      <text:h text:style-name="P1" text:outline-level="2">Гипотеза (продуктовая)</text:h>
      <text:p text:style-name="P11"><text:span text:style-name="Emphasis"><text:span text:style-name="T12"><text:s/></text:span></text:span><text:span text:style-name="Emphasis"><text:span text:style-name="T13">Гипотеза 1: Проверка ре</text:span></text:span><text:span text:style-name="Emphasis"><text:span text:style-name="T14">и</text:span></text:span><text:span text:style-name="Emphasis"><text:span text:style-name="T13">грабельности </text:span></text:span></text:p>
      <text:list text:style-name="L1">
        <text:list-item>
          <text:p text:style-name="P12">Мы считаем, что базовая механика выполнения бытовых ритуалов в условиях жесткого таймера (4 минуты) генерирует достаточный уровень азарта и вызова, чтобы мотивировать игрока на повторные прохождения. </text:p>
        </text:list-item>
        <text:list-item>
          <text:p text:style-name="P12">Для проверки этого мы проведем внутренний плейтест MVP-версии на целевой аудитории и измерим среднее количество сыгранных сессий подряд одним человеком без принуждения. </text:p>
        </text:list-item>
        <text:list-item>
          <text:p text:style-name="P13"><text:span text:style-name="T2">Мы окажемся правы, если достигнем показателя, при котором </text:span><text:span text:style-name="T15">70</text:span><text:span text:style-name="T2">% тестировщиков добровольно запустят игру минимум 3 раза подряд (перезапуски после смерти или победы) в рамках одного плейтеста.</text:span> </text:p>
        </text:list-item>
      </text:list>
      <text:h text:style-name="P14" text:outline-level="3">Гипотеза №2: <text:span text:style-name="T16">П</text:span>отенциал для спидраннеров</text:h>
      <text:list text:style-name="L2">
        <text:list-item>
          <text:p text:style-name="P15"><text:span text:style-name="T17">Мы считаем</text:span>, что если <text:span text:style-name="T18">построить строгую систему нарастани</text:span><text:span text:style-name="T19">я</text:span><text:span text:style-name="T18"> тревоги с последующими усложнениями геймплея</text:span>, игра приобретет<text:span text:style-name="T19"> спрос </text:span>для <text:span text:style-name="T19">спридраннеров</text:span>.</text:p>
        </text:list-item>
        <text:list-item>
          <text:p text:style-name="P16">Для проверки этого мы проведем: тестовые игровые сессии среди любителей спидраннеров, и измерим среднее количество повторных запусков игры одним пользователем в рамках одной сессии плейтеста.</text:p>
        </text:list-item>
        <text:list-item>
          <text:p text:style-name="P16">Мы окажемся правы, если достигнем: того, что не менее <text:span text:style-name="T18">60</text:span>% тестируемых из <text:span text:style-name="T19">спидран сообщества</text:span> <text:span text:style-name="T20">перепройдут игру для достижения наилучшего результата не менее 10 раз</text:span>.</text:p>
        </text:list-item>
      </text:list>
      <text:p text:style-name="P17">Гипотеза №<text:span text:style-name="T18">3</text:span>: Проверка эмоционального отклика</text:p>
      <text:list text:style-name="L3">
        <text:list-item>
          <text:p text:style-name="P18">Мы считаем, что жесткий четырехминутный цикл выполнения бытовой рутины в сочетании с прогрессирующими аудиовизуальными искажениями провоцирует у игрока резкие эмоциональные всплески и стабильно высокое напряжение непосредственно во время самого прохождения.</text:p>
        </text:list-item>
        <text:list-item>
          <text:p text:style-name="P18">Для проверки этого мы <text:span text:style-name="T20">сделаем релиз бета-теста</text:span> с последующим анкетированием и измерим субъективный уровень испытанного напряжения и последующего облегчения по 10-балльной шкале.</text:p>
        </text:list-item>
        <text:list-item>
          <text:p text:style-name="P19">Мы окажемся правы, если достигнем результата, при котором не менее 70% опрошенных <text:span text:style-name="T20">оценят уровень испытанного напряжения и последующего облегчения <text:s/>на 7 баллов и выше.</text:span></text:p>
        </text:list-item>
      </text:list>
      <text:p text:style-name="P20"><text:soft-page-break/></text:p>
      <text:h text:style-name="P14" text:outline-level="3"/>
      <text:p text:style-name="P11"><text:span text:style-name="Emphasis"><text:span text:style-name="T12"/></text:span></text:p>
      <text:h text:style-name="P1" text:outline-level="2">Календарный план (дорожная карта)</text:h>
      <text:p text:style-name="P2">Разбивка задачи и мероприятий с необходимыми ролями и временем на выполнение. Дополнительные форматы представления (например диаграмма Ганта) приветствуются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21"><text:span text:style-name="Strong_20_Emphasis_20__28_WW_29_"><text:span text:style-name="T21">№ п/п</text:span></text:span></text:p>
            </table:table-cell>
            <table:table-cell table:style-name="Таблица1.A1" office:value-type="string">
              <text:p text:style-name="P21"><text:span text:style-name="Strong_20_Emphasis_20__28_WW_29_"><text:span text:style-name="T21">Задача</text:span></text:span></text:p>
            </table:table-cell>
            <table:table-cell table:style-name="Таблица1.A1" office:value-type="string">
              <text:p text:style-name="P21"><text:span text:style-name="Strong_20_Emphasis_20__28_WW_29_"><text:span text:style-name="T21">Дата</text:span></text:span><text:span text:style-name="T22"> </text:span><text:span text:style-name="Strong_20_Emphasis_20__28_WW_29_"><text:span text:style-name="T21">реализации</text:span></text:span>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22"><text:s/><text:span text:style-name="T11">1 этап</text:span></text:p>
          </table:table-cell>
          <table:table-cell table:style-name="Таблица1.A1" office:value-type="string">
            <text:p text:style-name="P23">Пре-продакшн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Создание концепции игры </text:p>
          </table:table-cell>
          <table:table-cell table:style-name="Таблица1.A1" office:value-type="string">
            <text:p text:style-name="P24">06.03.2026 – 10.03.2026 </text:p>
          </table:table-cell>
        </table:table-row>
        <table:table-row table:style-name="Таблица1.1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4">Создание мудборда / концепт-артов </text:p>
          </table:table-cell>
          <table:table-cell table:style-name="Таблица1.A1" office:value-type="string">
            <text:p text:style-name="P24">11.03.2026 – 13.03.2026 </text:p>
          </table:table-cell>
        </table:table-row>
        <table:table-row table:style-name="Таблица1.1"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4">Написание сценария и реплик </text:p>
          </table:table-cell>
          <table:table-cell table:style-name="Таблица1.A1" office:value-type="string">
            <text:p text:style-name="P24">18.03.2026 – 24.03.2026 </text:p>
          </table:table-cell>
        </table:table-row>
        <table:table-row table:style-name="Таблица1.1"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4">Проектирование локации </text:p>
          </table:table-cell>
          <table:table-cell table:style-name="Таблица1.A1" office:value-type="string">
            <text:p text:style-name="P24">25.03.2026 – 27.03.2026 </text:p>
          </table:table-cell>
        </table:table-row>
        <table:table-row table:style-name="Таблица1.1">
          <table:table-cell table:style-name="Таблица1.A1" office:value-type="string">
            <text:p text:style-name="P25">5</text:p>
          </table:table-cell>
          <table:table-cell table:style-name="Таблица1.A1" office:value-type="string">
            <text:p text:style-name="P24">Проектирование UI/UX </text:p>
          </table:table-cell>
          <table:table-cell table:style-name="Таблица1.A1" office:value-type="string">
            <text:p text:style-name="P24">28.03.2026 – 29.03.2026 </text:p>
          </table:table-cell>
        </table:table-row>
        <table:table-row table:style-name="Таблица1.8">
          <table:table-cell table:style-name="Таблица1.A1" office:value-type="string">
            <text:p text:style-name="P25">6</text:p>
          </table:table-cell>
          <table:table-cell table:style-name="Таблица1.A1" office:value-type="string">
            <text:p text:style-name="P24">Создание звуковой концепции </text:p>
          </table:table-cell>
          <table:table-cell table:style-name="Таблица1.A1" office:value-type="string">
            <text:p text:style-name="P24">30.03.2026 </text:p>
          </table:table-cell>
        </table:table-row>
        <table:table-row table:style-name="Таблица1.1">
          <table:table-cell table:style-name="Таблица1.A1" office:value-type="string">
            <text:p text:style-name="P25">7</text:p>
          </table:table-cell>
          <table:table-cell table:style-name="Таблица1.A1" office:value-type="string">
            <text:p text:style-name="P24">Создание репозитория GitHub </text:p>
          </table:table-cell>
          <table:table-cell table:style-name="Таблица1.A1" office:value-type="string">
            <text:p text:style-name="P24">31.03.2026 </text:p>
          </table:table-cell>
        </table:table-row>
        <table:table-row table:style-name="Таблица1.1">
          <table:table-cell table:style-name="Таблица1.A1" office:value-type="string">
            <text:p text:style-name="P26">2-3 этап</text:p>
          </table:table-cell>
          <table:table-cell table:style-name="Таблица1.A1" office:value-type="string">
            <text:p text:style-name="P24"><text:span text:style-name="T10">Направление А (Контент)</text:span>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Создание 3D-моделей окружения </text:p>
          </table:table-cell>
          <table:table-cell table:style-name="Таблица1.A1" office:value-type="string">
            <text:p text:style-name="P24">01.04.2026 – 31.05.2026 </text:p>
          </table:table-cell>
        </table:table-row>
        <table:table-row table:style-name="Таблица1.1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4">Доработка сценария </text:p>
          </table:table-cell>
          <table:table-cell table:style-name="Таблица1.A1" office:value-type="string">
            <text:p text:style-name="P24">01.04.2026 – 15.04.2026 </text:p>
          </table:table-cell>
        </table:table-row>
        <table:table-row table:style-name="Таблица1.1"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4">Подбор эмбиентов и звуковых эффектов </text:p>
          </table:table-cell>
          <table:table-cell table:style-name="Таблица1.A1" office:value-type="string">
            <text:p text:style-name="P24">16.04.2026 – 10.05.2026 </text:p>
          </table:table-cell>
        </table:table-row>
        <table:table-row table:style-name="Таблица1.1"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4">Создание UI-элементов </text:p>
          </table:table-cell>
          <table:table-cell table:style-name="Таблица1.A1" office:value-type="string">
            <text:p text:style-name="P24">11.05.2026 – 13.05.2026 </text:p>
          </table:table-cell>
        </table:table-row>
        <table:table-row table:style-name="Таблица1.1">
          <table:table-cell table:style-name="Таблица1.A1" office:value-type="string">
            <text:p text:style-name="P26">2-3 этап</text:p>
          </table:table-cell>
          <table:table-cell table:style-name="Таблица1.A1" office:value-type="string">
            <text:p text:style-name="P27">Направление Б (Разработка)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Настройка проекта в движке, импорт ассетов </text:p>
          </table:table-cell>
          <table:table-cell table:style-name="Таблица1.A1" office:value-type="string">
            <text:p text:style-name="P24">01.04.2026 – 02.04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Грей-боксинг </text:p>
          </table:table-cell>
          <table:table-cell table:style-name="Таблица1.A1" office:value-type="string">
            <text:p text:style-name="P24">03.04.2026 </text:p>
          </table:table-cell>
        </table:table-row>
        <table:table-row table:style-name="Таблица1.1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Реализация контроллера персонажа </text:p>
          </table:table-cell>
          <table:table-cell table:style-name="Таблица1.A1" office:value-type="string">
            <text:p text:style-name="P24">04.04.2026 – 11.04.2026 </text:p>
          </table:table-cell>
        </table:table-row>
        <table:table-row table:style-name="Таблица1.1">
          <table:table-cell table:style-name="Таблица1.A1" office:value-type="string">
            <text:p text:style-name="P28">4</text:p>
          </table:table-cell>
          <table:table-cell table:style-name="Таблица1.A1" office:value-type="string">
            <text:p text:style-name="P24">Реализация систем ритуалов </text:p>
          </table:table-cell>
          <table:table-cell table:style-name="Таблица1.A1" office:value-type="string">
            <text:p text:style-name="P24">12.04.2026 – 11.05.2026 </text:p>
          </table:table-cell>
        </table:table-row>
        <table:table-row table:style-name="Таблица1.1">
          <table:table-cell table:style-name="Таблица1.A1" office:value-type="string">
            <text:p text:style-name="P28">5</text:p>
          </table:table-cell>
          <table:table-cell table:style-name="Таблица1.A1" office:value-type="string">
            <text:p text:style-name="P24">Создание инструментов </text:p>
          </table:table-cell>
          <table:table-cell table:style-name="Таблица1.A1" office:value-type="string">
            <text:p text:style-name="P24">12.05.2026 – 25.05.2026 </text:p>
          </table:table-cell>
        </table:table-row>
        <table:table-row table:style-name="Таблица1.1">
          <table:table-cell table:style-name="Таблица1.A1" office:value-type="string">
            <text:p text:style-name="P23">4 этап</text:p>
          </table:table-cell>
          <table:table-cell table:style-name="Таблица1.A1" office:value-type="string">
            <text:p text:style-name="P24"><text:span text:style-name="T10">Тестирование и доработка</text:span>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4">Функциональное и игровое тестирование </text:p>
          </table:table-cell>
          <table:table-cell table:style-name="Таблица1.A1" office:value-type="string">
            <text:p text:style-name="P24">06.06.2026 – 08.06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Исправление багов </text:p>
          </table:table-cell>
          <table:table-cell table:style-name="Таблица1.A1" office:value-type="string">
            <text:p text:style-name="P24">09.06.2026 – 18.06.2026 </text:p>
          </table:table-cell>
        </table:table-row>
        <table:table-row table:style-name="Таблица1.24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Финальная полировка проекта </text:p>
          </table:table-cell>
          <table:table-cell table:style-name="Таблица1.A1" office:value-type="string">
            <text:p text:style-name="P24">19.06.2026 – 20.06.2026 </text:p>
          </table:table-cell>
        </table:table-row>
        <table:table-row table:style-name="Таблица1.1">
          <table:table-cell table:style-name="Таблица1.A1" office:value-type="string">
            <text:p text:style-name="P23">5 этап</text:p>
          </table:table-cell>
          <table:table-cell table:style-name="Таблица1.A1" office:value-type="string">
            <text:p text:style-name="P23">Релиз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4">Финальная сборка стабильного билда </text:p>
          </table:table-cell>
          <table:table-cell table:style-name="Таблица1.A1" office:value-type="string">
            <text:p text:style-name="P24">21.06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Подготовка презентации </text:p>
          </table:table-cell>
          <table:table-cell table:style-name="Таблица1.A1" office:value-type="string">
            <text:p text:style-name="P24">22.06.2026 – 2<text:span text:style-name="T23">4</text:span>.06.2026 </text:p>
          </table:table-cell>
        </table:table-row>
        <table:table-row table:style-name="Таблица1.1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Защита проекта</text:p>
          </table:table-cell>
          <table:table-cell table:style-name="Таблица1.A1" office:value-type="string">
            <text:p text:style-name="P24">2<text:span text:style-name="T23">5</text:span>.06.2026 </text:p>
          </table:table-cell>
        </table:table-row>
      </table:table>
      <text:h text:style-name="P1" text:outline-level="2"><text:soft-page-break/></text:h>
      <text:h text:style-name="P1" text:outline-level="2">Команда проекта</text:h>
      <text:p text:style-name="P2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9">ФИ</text:p>
          </table:table-cell>
          <table:table-cell table:style-name="Таблица2.A1" office:value-type="string">
            <text:p text:style-name="P29">Роль в команде</text:p>
          </table:table-cell>
        </table:table-row>
        <table:table-row table:style-name="Таблица2.2">
          <table:table-cell table:style-name="Таблица2.A1" office:value-type="string">
            <text:p text:style-name="P29">Кононов Денис</text:p>
          </table:table-cell>
          <table:table-cell table:style-name="Таблица2.A1" office:value-type="string">
            <text:p text:style-name="P29"><text:span text:style-name="T24">Unity-</text:span>разработчик</text:p>
          </table:table-cell>
        </table:table-row>
        <table:table-row table:style-name="Таблица2.1">
          <table:table-cell table:style-name="Таблица2.A1" office:value-type="string">
            <text:p text:style-name="P29">Бобылев Максим</text:p>
          </table:table-cell>
          <table:table-cell table:style-name="Таблица2.A1" office:value-type="string">
            <text:p text:style-name="P29">3<text:span text:style-name="T24">d-</text:span>художник</text:p>
          </table:table-cell>
        </table:table-row>
        <table:table-row table:style-name="Таблица2.4">
          <table:table-cell table:style-name="Таблица2.A1" office:value-type="string">
            <text:p text:style-name="P29">Махмудов Эльвин</text:p>
          </table:table-cell>
          <table:table-cell table:style-name="Таблица2.A1" office:value-type="string">
            <text:p text:style-name="P30">Team Lead</text:p>
          </table:table-cell>
        </table:table-row>
        <table:table-row table:style-name="Таблица2.1">
          <table:table-cell table:style-name="Таблица2.A1" office:value-type="string">
            <text:p text:style-name="P29">Гайворонская Анжелика</text:p>
          </table:table-cell>
          <table:table-cell table:style-name="Таблица2.A1" office:value-type="string">
            <text:p text:style-name="P29">Левел-дизайнер</text:p>
          </table:table-cell>
        </table:table-row>
      </table:table>
      <text:p text:style-name="P2"/>
      <text:h text:style-name="P1" text:outline-level="2">Ресурсы</text:h>
      <text:p text:style-name="P2"/>
      <text:list xml:id="list476363370" text:style-name="WWNum12">
        <text:list-item>
          <text:p text:style-name="P31"><text:span text:style-name="Strong_20_Emphasis_20__28_WW_29_"><text:span text:style-name="T25">Товар (товарная продукция):</text:span></text:span><text:span text:style-name="T22"> 3D-модели и ассеты (Sketchfab), Игровая локация (Сцена), Уникальные 3D-модели, Программные скрипты(</text:span><text:span text:style-name="T26">C</text:span><text:span text:style-name="T22">#), Сценарий</text:span></text:p>
        </text:list-item>
        <text:list-item>
          <text:p text:style-name="P32"/>
        </text:list-item>
        <text:list-item text:style-override="WWNum1a">
          <text:p text:style-name="P33"><text:span text:style-name="Strong_20_Emphasis_20__28_WW_29_"><text:span text:style-name="T25">Работа:</text:span></text:span><text:span text:style-name="T22"> Игровой билд и код (Unity), 3D-модели (Blender), Сценарий и документация (Word, LibreOffice), Репозиторий (GitHub), Интерактивная доска(Figma)</text:span></text:p>
        </text:list-item>
        <text:list-item text:style-override="WWNum1a">
          <text:p text:style-name="P34"/>
        </text:list-item>
        <text:list-item text:style-override="WWNum1a">
          <text:p text:style-name="P35"><text:span text:style-name="Strong_20_Emphasis_20__28_WW_29_"><text:span text:style-name="T25">Услуга:</text:span></text:span><text:span text:style-name="T22"> Генерация контента (ИИ),Поиск визуальных решений и референсов (Pinterest, Fears to Fathom, Orderly Havoc),Обучение и поиск программных решений (Metanit), пары по ВПД/консультация по проекту(Илья Нигматуллин),курсы по 3д(</text:span><text:span text:style-name="T26">Youtube</text:span><text:span text:style-name="T22">)</text:span></text:p>
        </text:list-item>
      </text:list>
      <text:p text:style-name="P36"/>
      <text:h text:style-name="P1" text:outline-level="2"/>
      <text:h text:style-name="P1" text:outline-level="2">Риски</text:h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37">ID</text:p>
            </table:table-cell>
            <table:table-cell table:style-name="Таблица4.A1" office:value-type="string">
              <text:p text:style-name="P37">Риск</text:p>
            </table:table-cell>
            <table:table-cell table:style-name="Таблица4.A1" office:value-type="string">
              <text:p text:style-name="P37">Вероятность(1-5)</text:p>
            </table:table-cell>
            <table:table-cell table:style-name="Таблица4.A1" office:value-type="string">
              <text:p text:style-name="P37">Влияние</text:p>
              <text:p text:style-name="P37">(1-5)</text:p>
            </table:table-cell>
            <table:table-cell table:style-name="Таблица4.A1" office:value-type="string">
              <text:p text:style-name="P37">Приоритет (V×I)</text:p>
            </table:table-cell>
            <table:table-cell table:style-name="Таблица4.A1" office:value-type="string">
              <text:p text:style-name="P37">Меры по снижению</text:p>
            </table:table-cell>
            <table:table-cell table:style-name="Таблица4.A1" office:value-type="string">
              <text:p text:style-name="P37">Ответственность</text:p>
            </table:table-cell>
          </table:table-row>
        </table:table-header-rows>
        <table:table-row table:style-name="Таблица4.1">
          <table:table-cell table:style-name="Таблица4.A1" office:value-type="string">
            <text:p text:style-name="P24">R1</text:p>
          </table:table-cell>
          <table:table-cell table:style-name="Таблица4.A1" office:value-type="string">
            <text:p text:style-name="P24">Не успеем интегрировать все 3д модели в игру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2</text:p>
          </table:table-cell>
          <table:table-cell table:style-name="Таблица4.A1" office:value-type="string">
            <text:p text:style-name="P24">Сокращение количества уникальных моделей/Покупка готовых ассетов / Использование стоковых моделей</text:p>
          </table:table-cell>
          <table:table-cell table:style-name="Таблица4.A1" office:value-type="string">
            <text:p text:style-name="P24">Максим</text:p>
          </table:table-cell>
        </table:table-row>
        <table:table-row table:style-name="Таблица4.1">
          <table:table-cell table:style-name="Таблица4.A1" office:value-type="string">
            <text:p text:style-name="P24">R2</text:p>
          </table:table-cell>
          <table:table-cell table:style-name="Таблица4.A1" office:value-type="string">
            <text:p text:style-name="P24"><text:span text:style-name="T24">Unity </text:span>будет некорректно работать</text:p>
          </table:table-cell>
          <table:table-cell table:style-name="Таблица4.A1" office:value-type="string">
            <text:p text:style-name="P24">1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Проверять обновление <text:span text:style-name="T24">unity</text:span> и драйверов и всегда делать бэкап</text:p>
          </table:table-cell>
          <table:table-cell table:style-name="Таблица4.A1" office:value-type="string">
            <text:p text:style-name="P24">Денис</text:p>
          </table:table-cell>
        </table:table-row>
        <table:table-row table:style-name="Таблица4.1">
          <table:table-cell table:style-name="Таблица4.A1" office:value-type="string">
            <text:p text:style-name="P24">R3</text:p>
          </table:table-cell>
          <table:table-cell table:style-name="Таблица4.A1" office:value-type="string">
            <text:p text:style-name="P24">Заболел один из участников команды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15</text:p>
          </table:table-cell>
          <table:table-cell table:style-name="Таблица4.A1" office:value-type="string">
            <text:p text:style-name="P24"><text:span text:style-name="T23">Динамичность</text:span> ролей, ведение прозрачной <text:soft-page-break/>документации кода и ассетов в репозитории для быстрой передачи задач </text:p>
          </table:table-cell>
          <table:table-cell table:style-name="Таблица4.A1" office:value-type="string">
            <text:p text:style-name="P24">Вся команда</text:p>
          </table:table-cell>
        </table:table-row>
        <table:table-row table:style-name="Таблица4.1">
          <table:table-cell table:style-name="Таблица4.A1" office:value-type="string">
            <text:p text:style-name="P24">R4</text:p>
          </table:table-cell>
          <table:table-cell table:style-name="Таблица4.A1" office:value-type="string">
            <text:p text:style-name="P24">Из-за временных ограничений и дефицита времени на разработку/тестирование, <text:span text:style-name="T27">существует риск</text:span><text:span text:style-name="T27"> </text:span>возникновения <text:s/>усталости и выгорания членов команды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6</text:p>
          </table:table-cell>
          <table:table-cell table:style-name="Таблица4.A1" office:value-type="string">
            <text:p text:style-name="P24"><text:s/>Полный запрет на добавление новых идей до релиза/Выделение дней без со звонов и обсуждений для фокусной работы</text:p>
          </table:table-cell>
          <table:table-cell table:style-name="Таблица4.A1" office:value-type="string">
            <text:p text:style-name="P24">Эльвин</text:p>
          </table:table-cell>
        </table:table-row>
        <table:table-row table:style-name="Таблица4.6">
          <table:table-cell table:style-name="Таблица4.A1" office:value-type="string">
            <text:p text:style-name="P38">R5</text:p>
          </table:table-cell>
          <table:table-cell table:style-name="Таблица4.A1" office:value-type="string">
            <text:p text:style-name="P24">Технические проблемы с Git или хостингом проекта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6</text:p>
          </table:table-cell>
          <table:table-cell table:style-name="Таблица4.A1" office:value-type="string">
            <text:p text:style-name="P24">Всегда иметь бэкап <text:s/></text:p>
          </table:table-cell>
          <table:table-cell table:style-name="Таблица4.A1" office:value-type="string">
            <text:p text:style-name="P24">Денис</text:p>
          </table:table-cell>
        </table:table-row>
        <table:table-row table:style-name="Таблица4.6">
          <table:table-cell table:style-name="Таблица4.A1" office:value-type="string">
            <text:p text:style-name="P38">R6</text:p>
          </table:table-cell>
          <table:table-cell table:style-name="Таблица4.A1" office:value-type="string">
            <text:p text:style-name="P24">Конфликты в команде (разногласия по идеям)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2</text:p>
          </table:table-cell>
          <table:table-cell table:style-name="Таблица4.A1" office:value-type="string">
            <text:p text:style-name="P24">6</text:p>
          </table:table-cell>
          <table:table-cell table:style-name="Таблица4.A1" office:value-type="string">
            <text:p text:style-name="P24">Взять перерыв на 5 минут чтобы каждый мог выстроить свою идею сказать и аргументировать</text:p>
          </table:table-cell>
          <table:table-cell table:style-name="Таблица4.A1" office:value-type="string">
            <text:p text:style-name="P24">Эльвин</text:p>
          </table:table-cell>
        </table:table-row>
        <table:table-row table:style-name="Таблица4.6">
          <table:table-cell table:style-name="Таблица4.A1" office:value-type="string">
            <text:p text:style-name="P38">R7</text:p>
          </table:table-cell>
          <table:table-cell table:style-name="Таблица4.A1" office:value-type="string">
            <text:p text:style-name="P24">Нестабильная работа месенджера из-за который появляются проблемы с коммуникацией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1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Поменять мессенджер</text:p>
          </table:table-cell>
          <table:table-cell table:style-name="Таблица4.A1" office:value-type="string">
            <text:p text:style-name="P24">Вся команда</text:p>
          </table:table-cell>
        </table:table-row>
      </table:table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Title" style:next-style-name="Text_20_body_20__28_WW_29_" style:default-outline-level="1" style:list-style-name="" style:class="chapter"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Title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_20__28_WW_29_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system" style:font-pitch-asian="variable" style:font-weight-asian="bold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Index_20_Heading" style:display-name="Index Heading" style:family="paragraph" style:parent-style-name="Standard_20__28_WW_29_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_20__28_WW_29_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ka</meta:initial-creator>
    <meta:editing-cycles>22</meta:editing-cycles>
    <meta:creation-date>2026-05-18T15:16:00</meta:creation-date>
    <dc:date>2026-06-24T21:07:39.675125100</dc:date>
    <meta:editing-duration>P1DT13H10M54S</meta:editing-duration>
    <meta:generator>LibreOffice/26.2.0.3$Windows_X86_64 LibreOffice_project/620$Build-3</meta:generator>
    <meta:document-statistic meta:table-count="3" meta:image-count="0" meta:object-count="0" meta:page-count="6" meta:paragraph-count="212" meta:word-count="1173" meta:character-count="8825" meta:non-whitespace-character-count="7805"/>
    <meta:user-defined meta:name="AppVersion">16.0000</meta:user-defined>
    <meta:template xlink:type="simple" xlink:actuate="onRequest" xlink:title="Normal.dotm" xlink:href=""/>
  </office:meta>
</office:document-meta>
</file>